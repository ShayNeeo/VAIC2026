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automatic-styles>
    <style:style style:name="CoverCol" style:family="table-column" style:display-name="CoverCol">
      <style:table-column-properties style:column-width="17.8cm"/>
    </style:style>
    <style:style style:name="CalloutCol2" style:family="table-column" style:display-name="CalloutCol2">
      <style:table-column-properties style:column-width="17.9cm"/>
    </style:style>
    <style:style style:name="AutoCol3" style:family="table-column" style:display-name="AutoCol3">
      <style:table-column-properties style:column-width="5.0cm"/>
    </style:style>
    <style:style style:name="AutoCol4" style:family="table-column" style:display-name="AutoCol4">
      <style:table-column-properties style:column-width="12.8cm"/>
    </style:style>
    <style:style style:name="AutoCol5" style:family="table-column" style:display-name="AutoCol5">
      <style:table-column-properties style:column-width="3.2cm"/>
    </style:style>
    <style:style style:name="AutoCol6" style:family="table-column" style:display-name="AutoCol6">
      <style:table-column-properties style:column-width="6.0cm"/>
    </style:style>
    <style:style style:name="AutoCol7" style:family="table-column" style:display-name="AutoCol7">
      <style:table-column-properties style:column-width="8.6cm"/>
    </style:style>
    <style:style style:name="CalloutCol8" style:family="table-column" style:display-name="CalloutCol8">
      <style:table-column-properties style:column-width="17.9cm"/>
    </style:style>
    <style:style style:name="CalloutCol9" style:family="table-column" style:display-name="CalloutCol9">
      <style:table-column-properties style:column-width="17.9cm"/>
    </style:style>
    <style:style style:name="AutoCol10" style:family="table-column" style:display-name="AutoCol10">
      <style:table-column-properties style:column-width="8.1cm"/>
    </style:style>
    <style:style style:name="AutoCol11" style:family="table-column" style:display-name="AutoCol11">
      <style:table-column-properties style:column-width="9.7cm"/>
    </style:style>
    <style:style style:name="AutoCol12" style:family="table-column" style:display-name="AutoCol12">
      <style:table-column-properties style:column-width="3.4cm"/>
    </style:style>
    <style:style style:name="AutoCol13" style:family="table-column" style:display-name="AutoCol13">
      <style:table-column-properties style:column-width="9.0cm"/>
    </style:style>
    <style:style style:name="AutoCol14" style:family="table-column" style:display-name="AutoCol14">
      <style:table-column-properties style:column-width="5.4cm"/>
    </style:style>
    <style:style style:name="AutoCol15" style:family="table-column" style:display-name="AutoCol15">
      <style:table-column-properties style:column-width="3.4cm"/>
    </style:style>
    <style:style style:name="AutoCol16" style:family="table-column" style:display-name="AutoCol16">
      <style:table-column-properties style:column-width="7.5cm"/>
    </style:style>
    <style:style style:name="AutoCol17" style:family="table-column" style:display-name="AutoCol17">
      <style:table-column-properties style:column-width="6.9cm"/>
    </style:style>
    <style:style style:name="AutoCol18" style:family="table-column" style:display-name="AutoCol18">
      <style:table-column-properties style:column-width="3.0cm"/>
    </style:style>
    <style:style style:name="AutoCol19" style:family="table-column" style:display-name="AutoCol19">
      <style:table-column-properties style:column-width="8.2cm"/>
    </style:style>
    <style:style style:name="AutoCol20" style:family="table-column" style:display-name="AutoCol20">
      <style:table-column-properties style:column-width="6.6cm"/>
    </style:style>
    <style:style style:name="AutoCol21" style:family="table-column" style:display-name="AutoCol21">
      <style:table-column-properties style:column-width="4.0cm"/>
    </style:style>
    <style:style style:name="AutoCol22" style:family="table-column" style:display-name="AutoCol22">
      <style:table-column-properties style:column-width="8.2cm"/>
    </style:style>
    <style:style style:name="AutoCol23" style:family="table-column" style:display-name="AutoCol23">
      <style:table-column-properties style:column-width="5.6cm"/>
    </style:style>
    <style:style style:name="AutoCol24" style:family="table-column" style:display-name="AutoCol24">
      <style:table-column-properties style:column-width="4.2cm"/>
    </style:style>
    <style:style style:name="AutoCol25" style:family="table-column" style:display-name="AutoCol25">
      <style:table-column-properties style:column-width="13.6cm"/>
    </style:style>
    <style:style style:name="AutoCol26" style:family="table-column" style:display-name="AutoCol26">
      <style:table-column-properties style:column-width="10.2cm"/>
    </style:style>
    <style:style style:name="AutoCol27" style:family="table-column" style:display-name="AutoCol27">
      <style:table-column-properties style:column-width="7.6cm"/>
    </style:style>
    <style:style style:name="CalloutCol28" style:family="table-column" style:display-name="CalloutCol28">
      <style:table-column-properties style:column-width="17.9cm"/>
    </style:style>
    <style:style style:name="AutoCol29" style:family="table-column" style:display-name="AutoCol29">
      <style:table-column-properties style:column-width="4.2cm"/>
    </style:style>
    <style:style style:name="AutoCol30" style:family="table-column" style:display-name="AutoCol30">
      <style:table-column-properties style:column-width="13.6cm"/>
    </style:style>
    <style:style style:name="AutoCol31" style:family="table-column" style:display-name="AutoCol31">
      <style:table-column-properties style:column-width="10.2cm"/>
    </style:style>
    <style:style style:name="AutoCol32" style:family="table-column" style:display-name="AutoCol32">
      <style:table-column-properties style:column-width="7.6cm"/>
    </style:style>
    <style:style style:name="CalloutCol33" style:family="table-column" style:display-name="CalloutCol33">
      <style:table-column-properties style:column-width="17.9cm"/>
    </style:style>
    <style:style style:name="AutoCol34" style:family="table-column" style:display-name="AutoCol34">
      <style:table-column-properties style:column-width="4.2cm"/>
    </style:style>
    <style:style style:name="AutoCol35" style:family="table-column" style:display-name="AutoCol35">
      <style:table-column-properties style:column-width="13.6cm"/>
    </style:style>
    <style:style style:name="AutoCol36" style:family="table-column" style:display-name="AutoCol36">
      <style:table-column-properties style:column-width="10.2cm"/>
    </style:style>
    <style:style style:name="AutoCol37" style:family="table-column" style:display-name="AutoCol37">
      <style:table-column-properties style:column-width="7.6cm"/>
    </style:style>
    <style:style style:name="CalloutCol38" style:family="table-column" style:display-name="CalloutCol38">
      <style:table-column-properties style:column-width="17.9cm"/>
    </style:style>
    <style:style style:name="AutoCol39" style:family="table-column" style:display-name="AutoCol39">
      <style:table-column-properties style:column-width="4.2cm"/>
    </style:style>
    <style:style style:name="AutoCol40" style:family="table-column" style:display-name="AutoCol40">
      <style:table-column-properties style:column-width="13.6cm"/>
    </style:style>
    <style:style style:name="AutoCol41" style:family="table-column" style:display-name="AutoCol41">
      <style:table-column-properties style:column-width="10.2cm"/>
    </style:style>
    <style:style style:name="AutoCol42" style:family="table-column" style:display-name="AutoCol42">
      <style:table-column-properties style:column-width="7.6cm"/>
    </style:style>
    <style:style style:name="CalloutCol43" style:family="table-column" style:display-name="CalloutCol43">
      <style:table-column-properties style:column-width="17.9cm"/>
    </style:style>
    <style:style style:name="AutoCol44" style:family="table-column" style:display-name="AutoCol44">
      <style:table-column-properties style:column-width="4.2cm"/>
    </style:style>
    <style:style style:name="AutoCol45" style:family="table-column" style:display-name="AutoCol45">
      <style:table-column-properties style:column-width="13.6cm"/>
    </style:style>
    <style:style style:name="AutoCol46" style:family="table-column" style:display-name="AutoCol46">
      <style:table-column-properties style:column-width="10.2cm"/>
    </style:style>
    <style:style style:name="AutoCol47" style:family="table-column" style:display-name="AutoCol47">
      <style:table-column-properties style:column-width="7.6cm"/>
    </style:style>
    <style:style style:name="CalloutCol48" style:family="table-column" style:display-name="CalloutCol48">
      <style:table-column-properties style:column-width="17.9cm"/>
    </style:style>
    <style:style style:name="AutoCol49" style:family="table-column" style:display-name="AutoCol49">
      <style:table-column-properties style:column-width="4.2cm"/>
    </style:style>
    <style:style style:name="AutoCol50" style:family="table-column" style:display-name="AutoCol50">
      <style:table-column-properties style:column-width="13.6cm"/>
    </style:style>
    <style:style style:name="AutoCol51" style:family="table-column" style:display-name="AutoCol51">
      <style:table-column-properties style:column-width="10.2cm"/>
    </style:style>
    <style:style style:name="AutoCol52" style:family="table-column" style:display-name="AutoCol52">
      <style:table-column-properties style:column-width="7.6cm"/>
    </style:style>
    <style:style style:name="CalloutCol53" style:family="table-column" style:display-name="CalloutCol53">
      <style:table-column-properties style:column-width="17.9cm"/>
    </style:style>
    <style:style style:name="AutoCol54" style:family="table-column" style:display-name="AutoCol54">
      <style:table-column-properties style:column-width="4.2cm"/>
    </style:style>
    <style:style style:name="AutoCol55" style:family="table-column" style:display-name="AutoCol55">
      <style:table-column-properties style:column-width="13.6cm"/>
    </style:style>
    <style:style style:name="AutoCol56" style:family="table-column" style:display-name="AutoCol56">
      <style:table-column-properties style:column-width="10.2cm"/>
    </style:style>
    <style:style style:name="AutoCol57" style:family="table-column" style:display-name="AutoCol57">
      <style:table-column-properties style:column-width="7.6cm"/>
    </style:style>
    <style:style style:name="CalloutCol58" style:family="table-column" style:display-name="CalloutCol58">
      <style:table-column-properties style:column-width="17.9cm"/>
    </style:style>
    <style:style style:name="AutoCol59" style:family="table-column" style:display-name="AutoCol59">
      <style:table-column-properties style:column-width="4.2cm"/>
    </style:style>
    <style:style style:name="AutoCol60" style:family="table-column" style:display-name="AutoCol60">
      <style:table-column-properties style:column-width="13.6cm"/>
    </style:style>
    <style:style style:name="AutoCol61" style:family="table-column" style:display-name="AutoCol61">
      <style:table-column-properties style:column-width="10.2cm"/>
    </style:style>
    <style:style style:name="AutoCol62" style:family="table-column" style:display-name="AutoCol62">
      <style:table-column-properties style:column-width="7.6cm"/>
    </style:style>
    <style:style style:name="CalloutCol63" style:family="table-column" style:display-name="CalloutCol63">
      <style:table-column-properties style:column-width="17.9cm"/>
    </style:style>
    <style:style style:name="AutoCol64" style:family="table-column" style:display-name="AutoCol64">
      <style:table-column-properties style:column-width="4.2cm"/>
    </style:style>
    <style:style style:name="AutoCol65" style:family="table-column" style:display-name="AutoCol65">
      <style:table-column-properties style:column-width="13.6cm"/>
    </style:style>
    <style:style style:name="AutoCol66" style:family="table-column" style:display-name="AutoCol66">
      <style:table-column-properties style:column-width="10.2cm"/>
    </style:style>
    <style:style style:name="AutoCol67" style:family="table-column" style:display-name="AutoCol67">
      <style:table-column-properties style:column-width="7.6cm"/>
    </style:style>
    <style:style style:name="CalloutCol68" style:family="table-column" style:display-name="CalloutCol68">
      <style:table-column-properties style:column-width="17.9cm"/>
    </style:style>
    <style:style style:name="AutoCol69" style:family="table-column" style:display-name="AutoCol69">
      <style:table-column-properties style:column-width="4.2cm"/>
    </style:style>
    <style:style style:name="AutoCol70" style:family="table-column" style:display-name="AutoCol70">
      <style:table-column-properties style:column-width="13.6cm"/>
    </style:style>
    <style:style style:name="AutoCol71" style:family="table-column" style:display-name="AutoCol71">
      <style:table-column-properties style:column-width="10.2cm"/>
    </style:style>
    <style:style style:name="AutoCol72" style:family="table-column" style:display-name="AutoCol72">
      <style:table-column-properties style:column-width="7.6cm"/>
    </style:style>
    <style:style style:name="CalloutCol73" style:family="table-column" style:display-name="CalloutCol73">
      <style:table-column-properties style:column-width="17.9cm"/>
    </style:style>
    <style:style style:name="AutoCol74" style:family="table-column" style:display-name="AutoCol74">
      <style:table-column-properties style:column-width="4.2cm"/>
    </style:style>
    <style:style style:name="AutoCol75" style:family="table-column" style:display-name="AutoCol75">
      <style:table-column-properties style:column-width="13.6cm"/>
    </style:style>
    <style:style style:name="AutoCol76" style:family="table-column" style:display-name="AutoCol76">
      <style:table-column-properties style:column-width="10.2cm"/>
    </style:style>
    <style:style style:name="AutoCol77" style:family="table-column" style:display-name="AutoCol77">
      <style:table-column-properties style:column-width="7.6cm"/>
    </style:style>
    <style:style style:name="CalloutCol78" style:family="table-column" style:display-name="CalloutCol78">
      <style:table-column-properties style:column-width="17.9cm"/>
    </style:style>
    <style:style style:name="AutoCol79" style:family="table-column" style:display-name="AutoCol79">
      <style:table-column-properties style:column-width="4.2cm"/>
    </style:style>
    <style:style style:name="AutoCol80" style:family="table-column" style:display-name="AutoCol80">
      <style:table-column-properties style:column-width="13.6cm"/>
    </style:style>
    <style:style style:name="AutoCol81" style:family="table-column" style:display-name="AutoCol81">
      <style:table-column-properties style:column-width="10.2cm"/>
    </style:style>
    <style:style style:name="AutoCol82" style:family="table-column" style:display-name="AutoCol82">
      <style:table-column-properties style:column-width="7.6cm"/>
    </style:style>
    <style:style style:name="CalloutCol83" style:family="table-column" style:display-name="CalloutCol83">
      <style:table-column-properties style:column-width="17.9cm"/>
    </style:style>
    <style:style style:name="CalloutCol84" style:family="table-column" style:display-name="CalloutCol84">
      <style:table-column-properties style:column-width="17.9cm"/>
    </style:style>
    <style:style style:name="AutoCol85" style:family="table-column" style:display-name="AutoCol85">
      <style:table-column-properties style:column-width="4.2cm"/>
    </style:style>
    <style:style style:name="AutoCol86" style:family="table-column" style:display-name="AutoCol86">
      <style:table-column-properties style:column-width="13.6cm"/>
    </style:style>
    <style:style style:name="AutoCol87" style:family="table-column" style:display-name="AutoCol87">
      <style:table-column-properties style:column-width="4.2cm"/>
    </style:style>
    <style:style style:name="AutoCol88" style:family="table-column" style:display-name="AutoCol88">
      <style:table-column-properties style:column-width="13.6cm"/>
    </style:style>
    <style:style style:name="AutoCol89" style:family="table-column" style:display-name="AutoCol89">
      <style:table-column-properties style:column-width="4.0cm"/>
    </style:style>
    <style:style style:name="AutoCol90" style:family="table-column" style:display-name="AutoCol90">
      <style:table-column-properties style:column-width="13.8cm"/>
    </style:style>
    <style:style style:name="AutoCol91" style:family="table-column" style:display-name="AutoCol91">
      <style:table-column-properties style:column-width="3.3cm"/>
    </style:style>
    <style:style style:name="AutoCol92" style:family="table-column" style:display-name="AutoCol92">
      <style:table-column-properties style:column-width="4.7cm"/>
    </style:style>
    <style:style style:name="AutoCol93" style:family="table-column" style:display-name="AutoCol93">
      <style:table-column-properties style:column-width="4.2cm"/>
    </style:style>
    <style:style style:name="AutoCol94" style:family="table-column" style:display-name="AutoCol94">
      <style:table-column-properties style:column-width="5.6cm"/>
    </style:style>
    <style:style style:name="AutoCol95" style:family="table-column" style:display-name="AutoCol95">
      <style:table-column-properties style:column-width="4.6cm"/>
    </style:style>
    <style:style style:name="AutoCol96" style:family="table-column" style:display-name="AutoCol96">
      <style:table-column-properties style:column-width="6.3cm"/>
    </style:style>
    <style:style style:name="AutoCol97" style:family="table-column" style:display-name="AutoCol97">
      <style:table-column-properties style:column-width="6.9cm"/>
    </style:style>
    <style:style style:name="AutoCol98" style:family="table-column" style:display-name="AutoCol98">
      <style:table-column-properties style:column-width="4.2cm"/>
    </style:style>
    <style:style style:name="AutoCol99" style:family="table-column" style:display-name="AutoCol99">
      <style:table-column-properties style:column-width="6.0cm"/>
    </style:style>
    <style:style style:name="AutoCol100" style:family="table-column" style:display-name="AutoCol100">
      <style:table-column-properties style:column-width="7.6cm"/>
    </style:style>
    <style:style style:name="AutoCol101" style:family="table-column" style:display-name="AutoCol101">
      <style:table-column-properties style:column-width="4.2cm"/>
    </style:style>
    <style:style style:name="AutoCol102" style:family="table-column" style:display-name="AutoCol102">
      <style:table-column-properties style:column-width="13.6cm"/>
    </style:style>
    <style:style style:name="AutoCol103" style:family="table-column" style:display-name="AutoCol103">
      <style:table-column-properties style:column-width="4.2cm"/>
    </style:style>
    <style:style style:name="AutoCol104" style:family="table-column" style:display-name="AutoCol104">
      <style:table-column-properties style:column-width="6.8cm"/>
    </style:style>
    <style:style style:name="AutoCol105" style:family="table-column" style:display-name="AutoCol105">
      <style:table-column-properties style:column-width="6.8cm"/>
    </style:style>
    <style:style style:name="AutoCol106" style:family="table-column" style:display-name="AutoCol106">
      <style:table-column-properties style:column-width="7.3cm"/>
    </style:style>
    <style:style style:name="AutoCol107" style:family="table-column" style:display-name="AutoCol107">
      <style:table-column-properties style:column-width="4.2cm"/>
    </style:style>
    <style:style style:name="AutoCol108" style:family="table-column" style:display-name="AutoCol108">
      <style:table-column-properties style:column-width="6.3cm"/>
    </style:style>
    <style:style style:name="AutoCol109" style:family="table-column" style:display-name="AutoCol109">
      <style:table-column-properties style:column-width="4.5cm"/>
    </style:style>
    <style:style style:name="AutoCol110" style:family="table-column" style:display-name="AutoCol110">
      <style:table-column-properties style:column-width="13.3cm"/>
    </style:style>
    <style:style style:name="AutoCol111" style:family="table-column" style:display-name="AutoCol111">
      <style:table-column-properties style:column-width="3.3cm"/>
    </style:style>
    <style:style style:name="AutoCol112" style:family="table-column" style:display-name="AutoCol112">
      <style:table-column-properties style:column-width="8.0cm"/>
    </style:style>
    <style:style style:name="AutoCol113" style:family="table-column" style:display-name="AutoCol113">
      <style:table-column-properties style:column-width="6.5cm"/>
    </style:style>
    <style:style style:name="AutoCol114" style:family="table-column" style:display-name="AutoCol114">
      <style:table-column-properties style:column-width="2.7cm"/>
    </style:style>
    <style:style style:name="AutoCol115" style:family="table-column" style:display-name="AutoCol115">
      <style:table-column-properties style:column-width="2.3cm"/>
    </style:style>
    <style:style style:name="AutoCol116" style:family="table-column" style:display-name="AutoCol116">
      <style:table-column-properties style:column-width="6.8cm"/>
    </style:style>
    <style:style style:name="AutoCol117" style:family="table-column" style:display-name="AutoCol117">
      <style:table-column-properties style:column-width="6.0cm"/>
    </style:style>
    <style:style style:name="CalloutCol118" style:family="table-column" style:display-name="CalloutCol118">
      <style:table-column-properties style:column-width="17.9cm"/>
    </style:style>
  </office:automatic-styles>
  <office:body>
    <office:text>
      <table:table>
        <table:table-column table:style-name="CoverCol"/>
        <table:table-row>
          <table:table-cell table:style-name="CellHeader">
            <text:p text:style-name="Title">CẨM NANG SẢN PHẨM NGÂN HÀNG DOANH NGHIỆP</text:p>
            <text:p text:style-name="Subtitle">Bộ dữ liệu RAG mẫu cho Multi-Agent Sales Workspace</text:p>
            <text:p text:style-name="Subtitle">SHB làm nguồn chính • BIDV &amp; Vietcombank làm đối chiếu công khai</text:p>
            <text:p text:style-name="CoverMeta">PUBLIC-SOURCE BENCHMARK EDITION</text:p>
            <text:p text:style-name="CoverMeta">Mã tài liệu: RAG-KB-CORP-2026-01  |  Phiên bản 1.0</text:p>
            <text:p text:style-name="CoverMeta">Ngày chốt nguồn: 18/07/2026</text:p>
            <text:p text:style-name="CoverMeta">Mục đích: MVP/Hackathon, kiểm thử RAG và workflow có kiểm soát</text:p>
          </table:table-cell>
        </table:table-row>
      </table:table>
      <text:p text:style-name="Body"/>
      <table:table>
        <table:table-column table:style-name="CalloutCol2"/>
        <table:table-row>
          <table:table-cell table:style-name="CellStop">
            <text:p text:style-name="BodySmall"><text:span text:style-name="Strong">TUYÊN BỐ SỬ DỤNG</text:span></text:p>
            <text:p text:style-name="BodySmall">Tài liệu này không phải chính sách nội bộ, biểu phí hay cam kết chính thức của SHB, BIDV hoặc Vietcombank. Nội dung được tổng hợp từ nguồn công khai chính thức để tạo corpus RAG mẫu. Mọi phí, hạn mức, điều kiện tín dụng, quyết định KYC/AML và hành động đối ngoại phải được xác minh lại trên nguồn nội bộ còn hiệu lực và được người có thẩm quyền phê duyệt.</text:p>
          </table:table-cell>
        </table:table-row>
      </table:table>
      <text:p text:style-name="BodyTiny"/>
      <text:p text:style-name="Body">Đối tượng sử dụng: Product Agent, Legal/Eligibility Agent, Operations Agent, Evidence Validator, RM/Sales Reviewer và nhóm đánh giá hệ thống.</text:p>
      <text:p text:style-name="PageBreak"/>
      <text:h text:outline-level="1" text:style-name="H1">0. Kiểm soát tài liệu và nguyên tắc nguồn</text:h>
      <text:h text:outline-level="2" text:style-name="H2">0.1. Hồ sơ tài liệu</text:h>
      <table:table>
        <table:table-column table:style-name="AutoCol3"/>
        <table:table-column table:style-name="AutoCol4"/>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Tên tài liệu</text:p>
          </table:table-cell>
          <table:table-cell table:style-name="Cell">
            <text:p text:style-name="BodySmall">Cẩm nang sản phẩm ngân hàng doanh nghiệp – Bộ dữ liệu RAG mẫu</text:p>
          </table:table-cell>
        </table:table-row>
        <table:table-row>
          <table:table-cell table:style-name="CellLabel">
            <text:p text:style-name="BodySmall">Mã tài liệu</text:p>
          </table:table-cell>
          <table:table-cell table:style-name="CellAlt">
            <text:p text:style-name="BodySmall">RAG-KB-CORP-2026-01</text:p>
          </table:table-cell>
        </table:table-row>
        <table:table-row>
          <table:table-cell table:style-name="CellLabel">
            <text:p text:style-name="BodySmall">Phiên bản</text:p>
          </table:table-cell>
          <table:table-cell table:style-name="Cell">
            <text:p text:style-name="BodySmall">1.0</text:p>
          </table:table-cell>
        </table:table-row>
        <table:table-row>
          <table:table-cell table:style-name="CellLabel">
            <text:p text:style-name="BodySmall">Chủ đề</text:p>
          </table:table-cell>
          <table:table-cell table:style-name="CellAlt">
            <text:p text:style-name="BodySmall">Sản phẩm KHDN, điều kiện công khai, tín hiệu bán hàng, workflow và kiểm soát agent</text:p>
          </table:table-cell>
        </table:table-row>
        <table:table-row>
          <table:table-cell table:style-name="CellLabel">
            <text:p text:style-name="BodySmall">Ngân hàng nguồn chính</text:p>
          </table:table-cell>
          <table:table-cell table:style-name="Cell">
            <text:p text:style-name="BodySmall">Ngân hàng TMCP Sài Gòn – Hà Nội (SHB)</text:p>
          </table:table-cell>
        </table:table-row>
        <table:table-row>
          <table:table-cell table:style-name="CellLabel">
            <text:p text:style-name="BodySmall">Nguồn đối chiếu</text:p>
          </table:table-cell>
          <table:table-cell table:style-name="CellAlt">
            <text:p text:style-name="BodySmall">BIDV và Vietcombank</text:p>
          </table:table-cell>
        </table:table-row>
        <table:table-row>
          <table:table-cell table:style-name="CellLabel">
            <text:p text:style-name="BodySmall">Ngày chốt nguồn</text:p>
          </table:table-cell>
          <table:table-cell table:style-name="Cell">
            <text:p text:style-name="BodySmall">18/07/2026</text:p>
          </table:table-cell>
        </table:table-row>
        <table:table-row>
          <table:table-cell table:style-name="CellLabel">
            <text:p text:style-name="BodySmall">Phạm vi</text:p>
          </table:table-cell>
          <table:table-cell table:style-name="CellAlt">
            <text:p text:style-name="BodySmall">Dùng cho prototype, synthetic demo và đánh giá RAG; không dùng để cam kết với khách hàng</text:p>
          </table:table-cell>
        </table:table-row>
      </table:table>
      <text:p text:style-name="BodyTiny"/>
      <text:h text:outline-level="2" text:style-name="H2">0.2. Nhãn bằng chứng bắt buộc</text:h>
      <table:table>
        <table:table-column table:style-name="AutoCol5"/>
        <table:table-column table:style-name="AutoCol6"/>
        <table:table-column table:style-name="AutoCol7"/>
        <table:table-row>
          <table:table-cell table:style-name="CellHeader">
            <text:p text:style-name="BodyTiny">Nhãn</text:p>
          </table:table-cell>
          <table:table-cell table:style-name="CellHeader">
            <text:p text:style-name="BodyTiny">Ý nghĩa</text:p>
          </table:table-cell>
          <table:table-cell table:style-name="CellHeader">
            <text:p text:style-name="BodyTiny">Cách agent được phép dùng</text:p>
          </table:table-cell>
        </table:table-row>
        <table:table-row>
          <table:table-cell table:style-name="Cell">
            <text:p text:style-name="BodyTiny">VERIFIED_PUBLIC</text:p>
          </table:table-cell>
          <table:table-cell table:style-name="Cell">
            <text:p text:style-name="BodyTiny">Thông tin xuất hiện trên website/tài liệu chính thức của ngân hàng.</text:p>
          </table:table-cell>
          <table:table-cell table:style-name="Cell">
            <text:p text:style-name="BodyTiny">Được phép mô tả và trích nguồn; vẫn phải kiểm tra freshness đối với phí, lãi suất, hạn mức và chương trình.</text:p>
          </table:table-cell>
        </table:table-row>
        <table:table-row>
          <table:table-cell table:style-name="CellAlt">
            <text:p text:style-name="BodyTiny">REGULATORY</text:p>
          </table:table-cell>
          <table:table-cell table:style-name="CellAlt">
            <text:p text:style-name="BodyTiny">Quy định pháp luật hoặc văn bản NHNN từ nguồn chính thức.</text:p>
          </table:table-cell>
          <table:table-cell table:style-name="CellAlt">
            <text:p text:style-name="BodyTiny">Dùng làm ràng buộc khung; không thay thế policy nội bộ hoặc tư vấn pháp lý.</text:p>
          </table:table-cell>
        </table:table-row>
        <table:table-row>
          <table:table-cell table:style-name="Cell">
            <text:p text:style-name="BodyTiny">BENCHMARK_PUBLIC</text:p>
          </table:table-cell>
          <table:table-cell table:style-name="Cell">
            <text:p text:style-name="BodyTiny">Năng lực được ngân hàng khác công bố.</text:p>
          </table:table-cell>
          <table:table-cell table:style-name="Cell">
            <text:p text:style-name="BodyTiny">Chỉ dùng làm benchmark/candidate; không được mô tả là sản phẩm SHB.</text:p>
          </table:table-cell>
        </table:table-row>
        <table:table-row>
          <table:table-cell table:style-name="CellAlt">
            <text:p text:style-name="BodyTiny">DEMO_ASSUMPTION</text:p>
          </table:table-cell>
          <table:table-cell table:style-name="CellAlt">
            <text:p text:style-name="BodyTiny">Giả định vận hành do nhóm thiết kế để hoàn thiện MVP.</text:p>
          </table:table-cell>
          <table:table-cell table:style-name="CellAlt">
            <text:p text:style-name="BodyTiny">Phải hiển thị rõ là giả định; không được trình bày như chính sách thật.</text:p>
          </table:table-cell>
        </table:table-row>
        <table:table-row>
          <table:table-cell table:style-name="Cell">
            <text:p text:style-name="BodyTiny">INTERNAL_REQUIRED</text:p>
          </table:table-cell>
          <table:table-cell table:style-name="Cell">
            <text:p text:style-name="BodyTiny">Thông tin bắt buộc phải lấy từ catalog/policy/CRM/DMS nội bộ.</text:p>
          </table:table-cell>
          <table:table-cell table:style-name="Cell">
            <text:p text:style-name="BodyTiny">Agent phải dừng, yêu cầu nguồn nội bộ hoặc chuyển human review.</text:p>
          </table:table-cell>
        </table:table-row>
      </table:table>
      <text:p text:style-name="BodyTiny"/>
      <text:h text:outline-level="2" text:style-name="H2">0.3. Thứ tự ưu tiên nguồn</text:h>
      <text:p text:style-name="Body"><text:span text:style-name="EmBlue">1. </text:span>Nguồn nội bộ SHB đã được owner phê duyệt, có version, ngày hiệu lực và ACL.</text:p>
      <text:p text:style-name="Body"><text:span text:style-name="EmBlue">2. </text:span>Nguồn pháp luật/NHNN còn hiệu lực từ cổng văn bản chính thức.</text:p>
      <text:p text:style-name="Body"><text:span text:style-name="EmBlue">3. </text:span>Website, điều khoản, biểu phí và tài liệu hướng dẫn chính thức của SHB.</text:p>
      <text:p text:style-name="Body"><text:span text:style-name="EmBlue">4. </text:span>Nguồn công khai chính thức của BIDV/Vietcombank để benchmark, không dùng để xác nhận sản phẩm SHB.</text:p>
      <text:p text:style-name="Body"><text:span text:style-name="EmBlue">5. </text:span>Giả định demo có nhãn và expected behavior rõ ràng.</text:p>
      <table:table>
        <table:table-column table:style-name="CalloutCol8"/>
        <table:table-row>
          <table:table-cell table:style-name="CellStop">
            <text:p text:style-name="BodySmall"><text:span text:style-name="Strong">Hard veto</text:span></text:p>
            <text:p text:style-name="BodySmall">Không publish một claim vào answer hoặc action payload nếu thiếu source_id, ngày truy cập/hiệu lực, phạm vi áp dụng hoặc có xung đột chưa được giải quyết.</text:p>
          </table:table-cell>
        </table:table-row>
      </table:table>
      <text:p text:style-name="BodyTiny"/>
      <text:h text:outline-level="2" text:style-name="H2">0.4. Nguyên tắc làm mới</text:h>
      <text:p text:style-name="Body"><text:span text:style-name="EmBlue">• </text:span>Biểu phí, lãi suất, tỷ giá, hạn mức, ưu đãi: TTL tối đa 24 giờ hoặc truy vấn realtime khi có thể.</text:p>
      <text:p text:style-name="Body"><text:span text:style-name="EmBlue">• </text:span>Điều khoản dịch vụ và sản phẩm: kiểm tra lại khi source có ngày sửa đổi mới hoặc tối thiểu mỗi 30 ngày.</text:p>
      <text:p text:style-name="Body"><text:span text:style-name="EmBlue">• </text:span>Văn bản pháp luật: theo dõi lịch sử hiệu lực và văn bản hợp nhất/sửa đổi.</text:p>
      <text:p text:style-name="Body"><text:span text:style-name="EmBlue">• </text:span>Catalog sản phẩm nội bộ: invalidate index khi product version hoặc status thay đổi.</text:p>
      <text:p text:style-name="Body"><text:span text:style-name="EmBlue">• </text:span>Không hard-code nội dung khuyến mại đã hết thời hạn vào rule eligibility.</text:p>
      <text:p text:style-name="PageBreak"/>
      <text:h text:outline-level="1" text:style-name="H1">1. Tóm tắt điều hành</text:h>
      <text:p text:style-name="Body">Tài liệu này biến danh mục sản phẩm công khai của ngân hàng thành một knowledge base có cấu trúc để Multi-Agent Sales Workspace có thể: hiểu nhu cầu doanh nghiệp, tìm sản phẩm phù hợp, kiểm tra điều kiện sơ bộ, chuẩn bị checklist và tạo Decision Brief cho RM duyệt.</text:p>
      <table:table>
        <table:table-column table:style-name="CalloutCol9"/>
        <table:table-row>
          <table:table-cell table:style-name="CellOK">
            <text:p text:style-name="BodySmall"><text:span text:style-name="Strong">Nguyên tắc sản phẩm</text:span></text:p>
            <text:p text:style-name="BodySmall">Agent không bán “một câu trả lời”. Agent phải tạo một opportunity có product_id, business need, evidence, trạng thái theo nhánh, missing information, next-best-action và payload dự kiến.</text:p>
          </table:table-cell>
        </table:table-row>
      </table:table>
      <text:p text:style-name="BodyTiny"/>
      <text:h text:outline-level="2" text:style-name="H2">1.1. Sáu quyết định mà corpus phải hỗ trợ</text:h>
      <table:table>
        <table:table-column table:style-name="AutoCol10"/>
        <table:table-column table:style-name="AutoCol11"/>
        <table:table-row>
          <table:table-cell table:style-name="CellHeader">
            <text:p text:style-name="BodySmall">Câu hỏi nghiệp vụ</text:p>
          </table:table-cell>
          <table:table-cell table:style-name="CellHeader">
            <text:p text:style-name="BodySmall">Artifact cần trả về</text:p>
          </table:table-cell>
        </table:table-row>
        <table:table-row>
          <table:table-cell table:style-name="CellLabel">
            <text:p text:style-name="BodySmall">Doanh nghiệp đang cố giải quyết vấn đề gì?</text:p>
          </table:table-cell>
          <table:table-cell table:style-name="Cell">
            <text:p text:style-name="BodySmall">Need statement + facts + provenance</text:p>
          </table:table-cell>
        </table:table-row>
        <table:table-row>
          <table:table-cell table:style-name="CellLabel">
            <text:p text:style-name="BodySmall">Sản phẩm nào phù hợp?</text:p>
          </table:table-cell>
          <table:table-cell table:style-name="CellAlt">
            <text:p text:style-name="BodySmall">Candidate products + match rationale + alternatives</text:p>
          </table:table-cell>
        </table:table-row>
        <table:table-row>
          <table:table-cell table:style-name="CellLabel">
            <text:p text:style-name="BodySmall">Điều kiện công khai nào đã biết?</text:p>
          </table:table-cell>
          <table:table-cell table:style-name="Cell">
            <text:p text:style-name="BodySmall">Eligibility facts + prerequisites + source IDs</text:p>
          </table:table-cell>
        </table:table-row>
        <table:table-row>
          <table:table-cell table:style-name="CellLabel">
            <text:p text:style-name="BodySmall">Thiếu thông tin/tài liệu gì?</text:p>
          </table:table-cell>
          <table:table-cell table:style-name="CellAlt">
            <text:p text:style-name="BodySmall">Missing-fields checklist theo từng nhánh</text:p>
          </table:table-cell>
        </table:table-row>
        <table:table-row>
          <table:table-cell table:style-name="CellLabel">
            <text:p text:style-name="BodySmall">Có thể làm bước nào ngay?</text:p>
          </table:table-cell>
          <table:table-cell table:style-name="Cell">
            <text:p text:style-name="BodySmall">Branch status: ready / need_info / review / blocked</text:p>
          </table:table-cell>
        </table:table-row>
        <table:table-row>
          <table:table-cell table:style-name="CellLabel">
            <text:p text:style-name="BodySmall">RM đang duyệt chính xác điều gì?</text:p>
          </table:table-cell>
          <table:table-cell table:style-name="CellAlt">
            <text:p text:style-name="BodySmall">Frozen action payload + diff + evidence report</text:p>
          </table:table-cell>
        </table:table-row>
      </table:table>
      <text:p text:style-name="BodyTiny"/>
      <text:h text:outline-level="2" text:style-name="H2">1.2. Danh mục sản phẩm trong corpus</text:h>
      <table:table>
        <table:table-column table:style-name="AutoCol12"/>
        <table:table-column table:style-name="AutoCol13"/>
        <table:table-column table:style-name="AutoCol14"/>
        <table:table-row>
          <table:table-cell table:style-name="CellHeader">
            <text:p text:style-name="BodyTiny">Mã</text:p>
          </table:table-cell>
          <table:table-cell table:style-name="CellHeader">
            <text:p text:style-name="BodyTiny">Dòng sản phẩm</text:p>
          </table:table-cell>
          <table:table-cell table:style-name="CellHeader">
            <text:p text:style-name="BodyTiny">Trạng thái nguồn</text:p>
          </table:table-cell>
        </table:table-row>
        <table:table-row>
          <table:table-cell table:style-name="Cell">
            <text:p text:style-name="BodyTiny">SHB-CORP-ACC-001</text:p>
          </table:table-cell>
          <table:table-cell table:style-name="Cell">
            <text:p text:style-name="BodyTiny">Tài khoản thanh toán doanh nghiệp</text:p>
          </table:table-cell>
          <table:table-cell table:style-name="Cell">
            <text:p text:style-name="BodyTiny">SHB public + regulatory</text:p>
          </table:table-cell>
        </table:table-row>
        <table:table-row>
          <table:table-cell table:style-name="CellAlt">
            <text:p text:style-name="BodyTiny">SHB-CORP-DIGI-002</text:p>
          </table:table-cell>
          <table:table-cell table:style-name="CellAlt">
            <text:p text:style-name="BodyTiny">Internet Banking / Corporate Mobile</text:p>
          </table:table-cell>
          <table:table-cell table:style-name="CellAlt">
            <text:p text:style-name="BodyTiny">SHB public</text:p>
          </table:table-cell>
        </table:table-row>
        <table:table-row>
          <table:table-cell table:style-name="Cell">
            <text:p text:style-name="BodyTiny">SHB-CORP-PAY-003</text:p>
          </table:table-cell>
          <table:table-cell table:style-name="Cell">
            <text:p text:style-name="BodyTiny">Dịch vụ và gói chi trả lương</text:p>
          </table:table-cell>
          <table:table-cell table:style-name="Cell">
            <text:p text:style-name="BodyTiny">SHB public</text:p>
          </table:table-cell>
        </table:table-row>
        <table:table-row>
          <table:table-cell table:style-name="CellAlt">
            <text:p text:style-name="BodyTiny">SHB-CORP-CASH-004</text:p>
          </table:table-cell>
          <table:table-cell table:style-name="CellAlt">
            <text:p text:style-name="BodyTiny">Quản lý tài khoản tập trung</text:p>
          </table:table-cell>
          <table:table-cell table:style-name="CellAlt">
            <text:p text:style-name="BodyTiny">SHB public</text:p>
          </table:table-cell>
        </table:table-row>
        <table:table-row>
          <table:table-cell table:style-name="Cell">
            <text:p text:style-name="BodyTiny">SHB-CORP-CASH-005</text:p>
          </table:table-cell>
          <table:table-cell table:style-name="Cell">
            <text:p text:style-name="BodyTiny">Gói quản lý dòng tiền</text:p>
          </table:table-cell>
          <table:table-cell table:style-name="Cell">
            <text:p text:style-name="BodyTiny">SHB public</text:p>
          </table:table-cell>
        </table:table-row>
        <table:table-row>
          <table:table-cell table:style-name="CellAlt">
            <text:p text:style-name="BodyTiny">SHB-CORP-TAX-006</text:p>
          </table:table-cell>
          <table:table-cell table:style-name="CellAlt">
            <text:p text:style-name="BodyTiny">Thanh toán thuế hải quan online 24/7</text:p>
          </table:table-cell>
          <table:table-cell table:style-name="CellAlt">
            <text:p text:style-name="BodyTiny">SHB public</text:p>
          </table:table-cell>
        </table:table-row>
        <table:table-row>
          <table:table-cell table:style-name="Cell">
            <text:p text:style-name="BodyTiny">SHB-CORP-CARD-007</text:p>
          </table:table-cell>
          <table:table-cell table:style-name="Cell">
            <text:p text:style-name="BodyTiny">Thẻ tín dụng doanh nghiệp</text:p>
          </table:table-cell>
          <table:table-cell table:style-name="Cell">
            <text:p text:style-name="BodyTiny">SHB public</text:p>
          </table:table-cell>
        </table:table-row>
        <table:table-row>
          <table:table-cell table:style-name="CellAlt">
            <text:p text:style-name="BodyTiny">SHB-CORP-CREDIT-008</text:p>
          </table:table-cell>
          <table:table-cell table:style-name="CellAlt">
            <text:p text:style-name="BodyTiny">Thấu chi / vốn lưu động / cấp tín dụng nhanh</text:p>
          </table:table-cell>
          <table:table-cell table:style-name="CellAlt">
            <text:p text:style-name="BodyTiny">SHB public; high-risk</text:p>
          </table:table-cell>
        </table:table-row>
        <table:table-row>
          <table:table-cell table:style-name="Cell">
            <text:p text:style-name="BodyTiny">SHB-CORP-GUAR-009</text:p>
          </table:table-cell>
          <table:table-cell table:style-name="Cell">
            <text:p text:style-name="BodyTiny">Bảo lãnh ngân hàng</text:p>
          </table:table-cell>
          <table:table-cell table:style-name="Cell">
            <text:p text:style-name="BodyTiny">SHB public + regulatory</text:p>
          </table:table-cell>
        </table:table-row>
        <table:table-row>
          <table:table-cell table:style-name="CellAlt">
            <text:p text:style-name="BodyTiny">SHB-CORP-TFI-010</text:p>
          </table:table-cell>
          <table:table-cell table:style-name="CellAlt">
            <text:p text:style-name="BodyTiny">Tài trợ thương mại nhập khẩu</text:p>
          </table:table-cell>
          <table:table-cell table:style-name="CellAlt">
            <text:p text:style-name="BodyTiny">SHB public</text:p>
          </table:table-cell>
        </table:table-row>
        <table:table-row>
          <table:table-cell table:style-name="Cell">
            <text:p text:style-name="BodyTiny">SHB-CORP-TFE-011</text:p>
          </table:table-cell>
          <table:table-cell table:style-name="Cell">
            <text:p text:style-name="BodyTiny">Tài trợ thương mại xuất khẩu</text:p>
          </table:table-cell>
          <table:table-cell table:style-name="Cell">
            <text:p text:style-name="BodyTiny">SHB public</text:p>
          </table:table-cell>
        </table:table-row>
        <table:table-row>
          <table:table-cell table:style-name="CellAlt">
            <text:p text:style-name="BodyTiny">SHB-CORP-FX-012</text:p>
          </table:table-cell>
          <table:table-cell table:style-name="CellAlt">
            <text:p text:style-name="BodyTiny">Ngoại hối Spot / Forward / Swap</text:p>
          </table:table-cell>
          <table:table-cell table:style-name="CellAlt">
            <text:p text:style-name="BodyTiny">SHB public</text:p>
          </table:table-cell>
        </table:table-row>
        <table:table-row>
          <table:table-cell table:style-name="Cell">
            <text:p text:style-name="BodyTiny">BENCH-CORP-REC-013</text:p>
          </table:table-cell>
          <table:table-cell table:style-name="Cell">
            <text:p text:style-name="BodyTiny">Quản lý khoản phải thu / tài khoản định danh</text:p>
          </table:table-cell>
          <table:table-cell table:style-name="Cell">
            <text:p text:style-name="BodyTiny">VCB/BIDV benchmark</text:p>
          </table:table-cell>
        </table:table-row>
        <table:table-row>
          <table:table-cell table:style-name="CellAlt">
            <text:p text:style-name="BodyTiny">BENCH-CORP-ERP-014</text:p>
          </table:table-cell>
          <table:table-cell table:style-name="CellAlt">
            <text:p text:style-name="BodyTiny">Ngân hàng số nâng cao và kết nối ERP</text:p>
          </table:table-cell>
          <table:table-cell table:style-name="CellAlt">
            <text:p text:style-name="BodyTiny">BIDV/VCB benchmark</text:p>
          </table:table-cell>
        </table:table-row>
      </table:table>
      <text:p text:style-name="BodyTiny"/>
      <text:h text:outline-level="2" text:style-name="H2">1.3. Ma trận vai trò agent</text:h>
      <table:table>
        <table:table-column table:style-name="AutoCol15"/>
        <table:table-column table:style-name="AutoCol16"/>
        <table:table-column table:style-name="AutoCol17"/>
        <table:table-row>
          <table:table-cell table:style-name="CellHeader">
            <text:p text:style-name="BodyTiny">Khối</text:p>
          </table:table-cell>
          <table:table-cell table:style-name="CellHeader">
            <text:p text:style-name="BodyTiny">Vai trò</text:p>
          </table:table-cell>
          <table:table-cell table:style-name="CellHeader">
            <text:p text:style-name="BodyTiny">Không được phép</text:p>
          </table:table-cell>
        </table:table-row>
        <table:table-row>
          <table:table-cell table:style-name="Cell">
            <text:p text:style-name="BodyTiny">Need &amp; Signal Analyst</text:p>
          </table:table-cell>
          <table:table-cell table:style-name="Cell">
            <text:p text:style-name="BodyTiny">Chuẩn hóa facts, nhận diện need và confidence.</text:p>
          </table:table-cell>
          <table:table-cell table:style-name="Cell">
            <text:p text:style-name="BodyTiny">Không tự tạo product_id hoặc eligibility.</text:p>
          </table:table-cell>
        </table:table-row>
        <table:table-row>
          <table:table-cell table:style-name="CellAlt">
            <text:p text:style-name="BodyTiny">Product Agent</text:p>
          </table:table-cell>
          <table:table-cell table:style-name="CellAlt">
            <text:p text:style-name="BodyTiny">Retrieve catalog, xếp hạng candidate, gắn source.</text:p>
          </table:table-cell>
          <table:table-cell table:style-name="CellAlt">
            <text:p text:style-name="BodyTiny">Không xác nhận đủ điều kiện tín dụng.</text:p>
          </table:table-cell>
        </table:table-row>
        <table:table-row>
          <table:table-cell table:style-name="Cell">
            <text:p text:style-name="BodyTiny">Legal/Eligibility Agent</text:p>
          </table:table-cell>
          <table:table-cell table:style-name="Cell">
            <text:p text:style-name="BodyTiny">Chạy rule deterministic, xác định missing/review/block.</text:p>
          </table:table-cell>
          <table:table-cell table:style-name="Cell">
            <text:p text:style-name="BodyTiny">Không hạ mức severity hoặc coi unknown là pass.</text:p>
          </table:table-cell>
        </table:table-row>
        <table:table-row>
          <table:table-cell table:style-name="CellAlt">
            <text:p text:style-name="BodyTiny">Operations Agent</text:p>
          </table:table-cell>
          <table:table-cell table:style-name="CellAlt">
            <text:p text:style-name="BodyTiny">Tạo checklist, draft task/email, dedup và SLA.</text:p>
          </table:table-cell>
          <table:table-cell table:style-name="CellAlt">
            <text:p text:style-name="BodyTiny">Không gửi email/tạo CRM thật trước approval.</text:p>
          </table:table-cell>
        </table:table-row>
        <table:table-row>
          <table:table-cell table:style-name="Cell">
            <text:p text:style-name="BodyTiny">Evidence Validator</text:p>
          </table:table-cell>
          <table:table-cell table:style-name="Cell">
            <text:p text:style-name="BodyTiny">Kiểm claim–source–version–effective date.</text:p>
          </table:table-cell>
          <table:table-cell table:style-name="Cell">
            <text:p text:style-name="BodyTiny">Không xác nhận claim không được nguồn hỗ trợ.</text:p>
          </table:table-cell>
        </table:table-row>
        <table:table-row>
          <table:table-cell table:style-name="CellAlt">
            <text:p text:style-name="BodyTiny">RM Reviewer</text:p>
          </table:table-cell>
          <table:table-cell table:style-name="CellAlt">
            <text:p text:style-name="BodyTiny">Xem, sửa, chọn phạm vi và phê duyệt.</text:p>
          </table:table-cell>
          <table:table-cell table:style-name="CellAlt">
            <text:p text:style-name="BodyTiny">Không được bỏ qua hard block không có thẩm quyền.</text:p>
          </table:table-cell>
        </table:table-row>
      </table:table>
      <text:p text:style-name="BodyTiny"/>
      <text:p text:style-name="PageBreak"/>
      <text:h text:outline-level="1" text:style-name="H1">2. Hợp đồng dữ liệu chuẩn cho mỗi sản phẩm</text:h>
      <text:h text:outline-level="2" text:style-name="H2">2.1. Product Record</text:h>
      <text:p text:style-name="Body">Mỗi sản phẩm trong corpus được trình bày theo cùng một schema để RAG có thể chunk theo sản phẩm và agent có thể map trực tiếp sang typed output.</text:p>
      <table:table>
        <table:table-column table:style-name="AutoCol18"/>
        <table:table-column table:style-name="AutoCol19"/>
        <table:table-column table:style-name="AutoCol20"/>
        <table:table-row>
          <table:table-cell table:style-name="CellHeader">
            <text:p text:style-name="BodyTiny">Field</text:p>
          </table:table-cell>
          <table:table-cell table:style-name="CellHeader">
            <text:p text:style-name="BodyTiny">Mô tả</text:p>
          </table:table-cell>
          <table:table-cell table:style-name="CellHeader">
            <text:p text:style-name="BodyTiny">Yêu cầu</text:p>
          </table:table-cell>
        </table:table-row>
        <table:table-row>
          <table:table-cell table:style-name="Cell">
            <text:p text:style-name="BodyTiny">product_id</text:p>
          </table:table-cell>
          <table:table-cell table:style-name="Cell">
            <text:p text:style-name="BodyTiny">ID ổn định, không dùng tên marketing làm key.</text:p>
          </table:table-cell>
          <table:table-cell table:style-name="Cell">
            <text:p text:style-name="BodyTiny">Bắt buộc</text:p>
          </table:table-cell>
        </table:table-row>
        <table:table-row>
          <table:table-cell table:style-name="CellAlt">
            <text:p text:style-name="BodyTiny">bank</text:p>
          </table:table-cell>
          <table:table-cell table:style-name="CellAlt">
            <text:p text:style-name="BodyTiny">Ngân hàng sở hữu sản phẩm.</text:p>
          </table:table-cell>
          <table:table-cell table:style-name="CellAlt">
            <text:p text:style-name="BodyTiny">Bắt buộc</text:p>
          </table:table-cell>
        </table:table-row>
        <table:table-row>
          <table:table-cell table:style-name="Cell">
            <text:p text:style-name="BodyTiny">product_name</text:p>
          </table:table-cell>
          <table:table-cell table:style-name="Cell">
            <text:p text:style-name="BodyTiny">Tên công khai tại thời điểm truy cập.</text:p>
          </table:table-cell>
          <table:table-cell table:style-name="Cell">
            <text:p text:style-name="BodyTiny">Bắt buộc</text:p>
          </table:table-cell>
        </table:table-row>
        <table:table-row>
          <table:table-cell table:style-name="CellAlt">
            <text:p text:style-name="BodyTiny">category</text:p>
          </table:table-cell>
          <table:table-cell table:style-name="CellAlt">
            <text:p text:style-name="BodyTiny">account / digital / payroll / cash / card / credit / guarantee / trade / fx.</text:p>
          </table:table-cell>
          <table:table-cell table:style-name="CellAlt">
            <text:p text:style-name="BodyTiny">Bắt buộc</text:p>
          </table:table-cell>
        </table:table-row>
        <table:table-row>
          <table:table-cell table:style-name="Cell">
            <text:p text:style-name="BodyTiny">business_need</text:p>
          </table:table-cell>
          <table:table-cell table:style-name="Cell">
            <text:p text:style-name="BodyTiny">Vấn đề khách hàng được giải quyết.</text:p>
          </table:table-cell>
          <table:table-cell table:style-name="Cell">
            <text:p text:style-name="BodyTiny">Bắt buộc</text:p>
          </table:table-cell>
        </table:table-row>
        <table:table-row>
          <table:table-cell table:style-name="CellAlt">
            <text:p text:style-name="BodyTiny">target_profile</text:p>
          </table:table-cell>
          <table:table-cell table:style-name="CellAlt">
            <text:p text:style-name="BodyTiny">Đặc điểm doanh nghiệp có khả năng phù hợp.</text:p>
          </table:table-cell>
          <table:table-cell table:style-name="CellAlt">
            <text:p text:style-name="BodyTiny">Bắt buộc</text:p>
          </table:table-cell>
        </table:table-row>
        <table:table-row>
          <table:table-cell table:style-name="Cell">
            <text:p text:style-name="BodyTiny">public_features</text:p>
          </table:table-cell>
          <table:table-cell table:style-name="Cell">
            <text:p text:style-name="BodyTiny">Facts có nguồn công khai.</text:p>
          </table:table-cell>
          <table:table-cell table:style-name="Cell">
            <text:p text:style-name="BodyTiny">Bắt buộc + source_id</text:p>
          </table:table-cell>
        </table:table-row>
        <table:table-row>
          <table:table-cell table:style-name="CellAlt">
            <text:p text:style-name="BodyTiny">public_conditions</text:p>
          </table:table-cell>
          <table:table-cell table:style-name="CellAlt">
            <text:p text:style-name="BodyTiny">Điều kiện được công bố công khai.</text:p>
          </table:table-cell>
          <table:table-cell table:style-name="CellAlt">
            <text:p text:style-name="BodyTiny">Nếu có</text:p>
          </table:table-cell>
        </table:table-row>
        <table:table-row>
          <table:table-cell table:style-name="Cell">
            <text:p text:style-name="BodyTiny">internal_required</text:p>
          </table:table-cell>
          <table:table-cell table:style-name="Cell">
            <text:p text:style-name="BodyTiny">Điểm phải kiểm tra trong policy/catalog nội bộ.</text:p>
          </table:table-cell>
          <table:table-cell table:style-name="Cell">
            <text:p text:style-name="BodyTiny">Bắt buộc cho high-risk</text:p>
          </table:table-cell>
        </table:table-row>
        <table:table-row>
          <table:table-cell table:style-name="CellAlt">
            <text:p text:style-name="BodyTiny">sales_signals</text:p>
          </table:table-cell>
          <table:table-cell table:style-name="CellAlt">
            <text:p text:style-name="BodyTiny">Tín hiệu dùng để tạo opportunity.</text:p>
          </table:table-cell>
          <table:table-cell table:style-name="CellAlt">
            <text:p text:style-name="BodyTiny">Derived; có provenance</text:p>
          </table:table-cell>
        </table:table-row>
        <table:table-row>
          <table:table-cell table:style-name="Cell">
            <text:p text:style-name="BodyTiny">discovery_questions</text:p>
          </table:table-cell>
          <table:table-cell table:style-name="Cell">
            <text:p text:style-name="BodyTiny">Câu hỏi RM cần xác nhận.</text:p>
          </table:table-cell>
          <table:table-cell table:style-name="Cell">
            <text:p text:style-name="BodyTiny">Tối đa 5 câu</text:p>
          </table:table-cell>
        </table:table-row>
        <table:table-row>
          <table:table-cell table:style-name="CellAlt">
            <text:p text:style-name="BodyTiny">branch_status</text:p>
          </table:table-cell>
          <table:table-cell table:style-name="CellAlt">
            <text:p text:style-name="BodyTiny">ready / need_info / review / blocked.</text:p>
          </table:table-cell>
          <table:table-cell table:style-name="CellAlt">
            <text:p text:style-name="BodyTiny">Theo từng sản phẩm</text:p>
          </table:table-cell>
        </table:table-row>
        <table:table-row>
          <table:table-cell table:style-name="Cell">
            <text:p text:style-name="BodyTiny">source_ids</text:p>
          </table:table-cell>
          <table:table-cell table:style-name="Cell">
            <text:p text:style-name="BodyTiny">Danh sách nguồn hỗ trợ.</text:p>
          </table:table-cell>
          <table:table-cell table:style-name="Cell">
            <text:p text:style-name="BodyTiny">Bắt buộc</text:p>
          </table:table-cell>
        </table:table-row>
      </table:table>
      <text:p text:style-name="BodyTiny"/>
      <text:h text:outline-level="2" text:style-name="H2">2.2. Trạng thái nhánh</text:h>
      <table:table>
        <table:table-column table:style-name="AutoCol21"/>
        <table:table-column table:style-name="AutoCol22"/>
        <table:table-column table:style-name="AutoCol23"/>
        <table:table-row>
          <table:table-cell table:style-name="CellHeader">
            <text:p text:style-name="BodyTiny">Trạng thái</text:p>
          </table:table-cell>
          <table:table-cell table:style-name="CellHeader">
            <text:p text:style-name="BodyTiny">Ý nghĩa</text:p>
          </table:table-cell>
          <table:table-cell table:style-name="CellHeader">
            <text:p text:style-name="BodyTiny">Hành vi UI</text:p>
          </table:table-cell>
        </table:table-row>
        <table:table-row>
          <table:table-cell table:style-name="Cell">
            <text:p text:style-name="BodyTiny">READY_TO_PREPARE</text:p>
          </table:table-cell>
          <table:table-cell table:style-name="Cell">
            <text:p text:style-name="BodyTiny">Đủ dữ liệu để chuẩn bị opportunity/draft; chưa phải phê duyệt sản phẩm.</text:p>
          </table:table-cell>
          <table:table-cell table:style-name="Cell">
            <text:p text:style-name="BodyTiny">Cho phép chọn action draft.</text:p>
          </table:table-cell>
        </table:table-row>
        <table:table-row>
          <table:table-cell table:style-name="CellAlt">
            <text:p text:style-name="BodyTiny">NEED_INFORMATION</text:p>
          </table:table-cell>
          <table:table-cell table:style-name="CellAlt">
            <text:p text:style-name="BodyTiny">Thiếu field/tài liệu có ảnh hưởng quyết định.</text:p>
          </table:table-cell>
          <table:table-cell table:style-name="CellAlt">
            <text:p text:style-name="BodyTiny">Hiển thị checklist; cho phép tạo task bổ sung.</text:p>
          </table:table-cell>
        </table:table-row>
        <table:table-row>
          <table:table-cell table:style-name="Cell">
            <text:p text:style-name="BodyTiny">REVIEW_REQUIRED</text:p>
          </table:table-cell>
          <table:table-cell table:style-name="Cell">
            <text:p text:style-name="BodyTiny">Có ngoại lệ, xung đột hoặc high-risk.</text:p>
          </table:table-cell>
          <table:table-cell table:style-name="Cell">
            <text:p text:style-name="BodyTiny">Chuyển chuyên gia/người có thẩm quyền.</text:p>
          </table:table-cell>
        </table:table-row>
        <table:table-row>
          <table:table-cell table:style-name="CellAlt">
            <text:p text:style-name="BodyTiny">BLOCKED</text:p>
          </table:table-cell>
          <table:table-cell table:style-name="CellAlt">
            <text:p text:style-name="BodyTiny">Vi phạm hard rule, quyền truy cập hoặc evidence.</text:p>
          </table:table-cell>
          <table:table-cell table:style-name="CellAlt">
            <text:p text:style-name="BodyTiny">Không cho tạo action đối ngoại.</text:p>
          </table:table-cell>
        </table:table-row>
        <table:table-row>
          <table:table-cell table:style-name="Cell">
            <text:p text:style-name="BodyTiny">NOT_SUPPORTED</text:p>
          </table:table-cell>
          <table:table-cell table:style-name="Cell">
            <text:p text:style-name="BodyTiny">Không có sản phẩm/source đủ căn cứ.</text:p>
          </table:table-cell>
          <table:table-cell table:style-name="Cell">
            <text:p text:style-name="BodyTiny">Nêu giới hạn; không bịa sản phẩm.</text:p>
          </table:table-cell>
        </table:table-row>
      </table:table>
      <text:p text:style-name="BodyTiny"/>
      <text:h text:outline-level="2" text:style-name="H2">2.3. Mẫu JSON tối thiểu</text:h>
      <text:p text:style-name="Code">{
  "product_id": "SHB-CORP-PAY-003",
  "bank": "SHB",
  "product_name": "Dịch vụ chi trả lương",
  "category": "payroll",
  "business_need": ["payroll_automation", "cash_risk_reduction"],
  "target_profile": {"employees_count": "&gt;= 20", "has_payment_account": true},
  "public_conditions": ["Khách hàng doanh nghiệp có tài khoản tại SHB"],
  "internal_required": ["active_fee_schedule", "service_agreement", "account_authority"],
  "source_ids": ["SRC-SHB-003", "SRC-SHB-004"],
  "data_label": "PUBLIC_SOURCE_DEMO"
}</text:p>
      <text:p text:style-name="PageBreak"/>
      <text:p text:style-name="SectionKicker">HỒ SƠ SẢN PHẨM 01</text:p>
      <text:h text:outline-level="1" text:style-name="H1">SHB-CORP-ACC-001 — Tài khoản thanh toán doanh nghiệp</text:h>
      <table:table>
        <table:table-column table:style-name="AutoCol24"/>
        <table:table-column table:style-name="AutoCol25"/>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Tài khoản &amp; nền tảng cơ sở</text:p>
          </table:table-cell>
        </table:table-row>
        <table:table-row>
          <table:table-cell table:style-name="CellLabel">
            <text:p text:style-name="BodySmall">Mức rủi ro</text:p>
          </table:table-cell>
          <table:table-cell table:style-name="CellAlt">
            <text:p text:style-name="BodySmall">Trung bình</text:p>
          </table:table-cell>
        </table:table-row>
        <table:table-row>
          <table:table-cell table:style-name="CellLabel">
            <text:p text:style-name="BodySmall">Nhãn nguồn</text:p>
          </table:table-cell>
          <table:table-cell table:style-name="Cell">
            <text:p text:style-name="BodySmall">VERIFIED_PUBLIC + REGULATORY</text:p>
          </table:table-cell>
        </table:table-row>
        <table:table-row>
          <table:table-cell table:style-name="CellLabel">
            <text:p text:style-name="BodySmall">Business need</text:p>
          </table:table-cell>
          <table:table-cell table:style-name="CellAlt">
            <text:p text:style-name="BodySmall">Thiết lập tài khoản giao dịch cơ sở để nhận tiền, thanh toán và kích hoạt các dịch vụ số/doanh nghiệp khác.</text:p>
          </table:table-cell>
        </table:table-row>
      </table:table>
      <text:p text:style-name="BodyTiny"/>
      <text:h text:outline-level="2" text:style-name="H2">Khách hàng mục tiêu</text:h>
      <text:p text:style-name="Body"><text:span text:style-name="EmBlue">• </text:span>Doanh nghiệp mới bắt đầu quan hệ với SHB.</text:p>
      <text:p text:style-name="Body"><text:span text:style-name="EmBlue">• </text:span>Doanh nghiệp cần tách tài khoản theo mục đích, chi nhánh hoặc đơn vị thành viên.</text:p>
      <text:p text:style-name="Body"><text:span text:style-name="EmBlue">• </text:span>Doanh nghiệp muốn dùng Internet Banking, payroll, cash management, thuế, thẻ hoặc tài trợ thương mại.</text:p>
      <text:h text:outline-level="2" text:style-name="H2">Thông tin công khai đã xác minh</text:h>
      <text:p text:style-name="Body"><text:span text:style-name="EmBlue">• </text:span>SHB công bố bộ điều kiện, điều khoản mở và sử dụng tài khoản thanh toán dành cho khách hàng tổ chức ngày 20/06/2025.</text:p>
      <text:p text:style-name="Body"><text:span text:style-name="EmBlue">• </text:span>Dịch vụ Internet Banking doanh nghiệp yêu cầu khách hàng có tài khoản thanh toán tại SHB.</text:p>
      <text:p text:style-name="Body"><text:span text:style-name="EmBlue">• </text:span>Hồ sơ công khai cho đăng ký ngân hàng điện tử gồm giấy phép/đăng ký doanh nghiệp, quyết định bổ nhiệm, giấy tờ người đại diện, giấy ủy quyền nếu có và giấy tờ người được ủy quyền.</text:p>
      <text:p text:style-name="Body"><text:span text:style-name="EmBlue">• </text:span>Thông tư 17/2024/TT-NHNN là khung pháp lý về mở và sử dụng tài khoản thanh toán; tình trạng hiệu lực phải được kiểm tra trên CSDL VBPL.</text:p>
      <text:h text:outline-level="2" text:style-name="H2">Điều kiện công khai / điều kiện tối thiểu</text:h>
      <text:p text:style-name="Body"><text:span text:style-name="EmBlue">• </text:span>Pháp nhân/tổ chức và người đại diện phải được nhận biết, xác minh theo quy định hiện hành.</text:p>
      <text:p text:style-name="Body"><text:span text:style-name="EmBlue">• </text:span>Tài khoản và người dùng chỉ được kích hoạt theo thẩm quyền đã đăng ký.</text:p>
      <text:h text:outline-level="2" text:style-name="H2">Thông tin bắt buộc lấy từ hệ thống nội bộ</text:h>
      <text:p text:style-name="Body"><text:span text:style-name="EmBlue">• </text:span>Biểu phí và số dư/điều kiện hiện hành.</text:p>
      <text:p text:style-name="Body"><text:span text:style-name="EmBlue">• </text:span>Danh sách hồ sơ chi tiết theo loại pháp nhân.</text:p>
      <text:p text:style-name="Body"><text:span text:style-name="EmBlue">• </text:span>Kết quả KYC/AML, UBO, FATCA và quyền ký.</text:p>
      <text:h text:outline-level="2" text:style-name="H2">Tín hiệu tạo cơ hội bán hàng</text:h>
      <text:p text:style-name="Body"><text:span text:style-name="EmBlue">• </text:span>Khách hàng chưa có tài khoản SHB.</text:p>
      <text:p text:style-name="Body"><text:span text:style-name="EmBlue">• </text:span>Opportunity khác phụ thuộc tài khoản thanh toán.</text:p>
      <text:p text:style-name="Body"><text:span text:style-name="EmBlue">• </text:span>Nhu cầu mở nhiều tài khoản hoặc phân quyền nhiều cấp.</text:p>
      <text:h text:outline-level="2" text:style-name="H2">Câu hỏi discovery cho RM</text:h>
      <text:p text:style-name="Body"><text:span text:style-name="EmBlue">1. </text:span>Doanh nghiệp cần tài khoản VNĐ, ngoại tệ hay cả hai?</text:p>
      <text:p text:style-name="Body"><text:span text:style-name="EmBlue">2. </text:span>Ai là chủ tài khoản, người tạo lệnh và người phê duyệt?</text:p>
      <text:p text:style-name="Body"><text:span text:style-name="EmBlue">3. </text:span>Mô hình công ty mẹ–con hay nhiều chi nhánh?</text:p>
      <text:p text:style-name="Body"><text:span text:style-name="EmBlue">4. </text:span>Dịch vụ nào cần kích hoạt ngay sau mở tài khoản?</text:p>
      <text:h text:outline-level="2" text:style-name="H2">Hành vi Multi-Agent</text:h>
      <text:p text:style-name="Body">Product Agent tạo sản phẩm cơ sở; Legal Agent xác minh pháp nhân/người đại diện; Operations Agent tạo checklist mở tài khoản. Không cho phép “READY” nếu customer identity hoặc authority chưa được xác minh.</text:p>
      <table:table>
        <table:table-column table:style-name="AutoCol26"/>
        <table:table-column table:style-name="AutoCol27"/>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DIGI-002, SHB-CORP-PAY-003, SHB-CORP-CASH-004, SHB-CORP-TAX-006</text:p>
          </table:table-cell>
          <table:table-cell table:style-name="Cell">
            <text:p text:style-name="BodySmall">SRC-SHB-001, SRC-SHB-002, SRC-REG-001</text:p>
          </table:table-cell>
        </table:table-row>
      </table:table>
      <text:p text:style-name="BodyTiny"/>
      <table:table>
        <table:table-column table:style-name="CalloutCol28"/>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2</text:p>
      <text:h text:outline-level="1" text:style-name="H1">SHB-CORP-DIGI-002 — Internet Banking / SHB Corporate Mobile</text:h>
      <table:table>
        <table:table-column table:style-name="AutoCol29"/>
        <table:table-column table:style-name="AutoCol30"/>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Ngân hàng số doanh nghiệp</text:p>
          </table:table-cell>
        </table:table-row>
        <table:table-row>
          <table:table-cell table:style-name="CellLabel">
            <text:p text:style-name="BodySmall">Mức rủi ro</text:p>
          </table:table-cell>
          <table:table-cell table:style-name="CellAlt">
            <text:p text:style-name="BodySmall">Trung bình</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Cho phép doanh nghiệp vấn tin, lập và phê duyệt giao dịch từ xa, theo lô và theo cấp quyền.</text:p>
          </table:table-cell>
        </table:table-row>
      </table:table>
      <text:p text:style-name="BodyTiny"/>
      <text:h text:outline-level="2" text:style-name="H2">Khách hàng mục tiêu</text:h>
      <text:p text:style-name="Body"><text:span text:style-name="EmBlue">• </text:span>Doanh nghiệp có tài khoản thanh toán tại SHB.</text:p>
      <text:p text:style-name="Body"><text:span text:style-name="EmBlue">• </text:span>Doanh nghiệp có nhiều giao dịch/chứng từ hoặc người phê duyệt ở nhiều địa điểm.</text:p>
      <text:p text:style-name="Body"><text:span text:style-name="EmBlue">• </text:span>Doanh nghiệp cần chuyển tiền, chi lương, tra cứu bảo lãnh/L/C hoặc quản lý thẻ trên kênh số.</text:p>
      <text:h text:outline-level="2" text:style-name="H2">Thông tin công khai đã xác minh</text:h>
      <text:p text:style-name="Body"><text:span text:style-name="EmBlue">• </text:span>SHB Internet Banking hỗ trợ vấn tin tài khoản, tiền gửi, tiền vay; chuyển tiền trong/ngoài hệ thống; chuyển tiền theo lô; thanh toán lương; truy vấn bảo lãnh, L/C và nhờ thu; đăng ký chuyển tiền quốc tế và phát hành L/C.</text:p>
      <text:p text:style-name="Body"><text:span text:style-name="EmBlue">• </text:span>SHB công bố cơ chế xác thực bằng Smart OTP và/hoặc chữ ký số cho dịch vụ tài chính.</text:p>
      <text:p text:style-name="Body"><text:span text:style-name="EmBlue">• </text:span>Thông tin nâng cấp công bố khả năng phân quyền 2–3 cấp và hạn mức liên ngân hàng đến 100 tỷ đồng/ngày tại thời điểm công bố năm 2023; agent phải kiểm tra điều khoản hiện hành trước khi nêu hạn mức.</text:p>
      <text:h text:outline-level="2" text:style-name="H2">Điều kiện công khai / điều kiện tối thiểu</text:h>
      <text:p text:style-name="Body"><text:span text:style-name="EmBlue">• </text:span>Có tài khoản thanh toán và đăng ký dịch vụ ngân hàng điện tử.</text:p>
      <text:p text:style-name="Body"><text:span text:style-name="EmBlue">• </text:span>Người dùng, vai trò tạo/kiểm soát/phê duyệt và phương thức xác thực phải được đăng ký.</text:p>
      <text:h text:outline-level="2" text:style-name="H2">Thông tin bắt buộc lấy từ hệ thống nội bộ</text:h>
      <text:p text:style-name="Body"><text:span text:style-name="EmBlue">• </text:span>Hạn mức và biểu phí hiện hành.</text:p>
      <text:p text:style-name="Body"><text:span text:style-name="EmBlue">• </text:span>Danh mục tính năng theo gói và phiên bản.</text:p>
      <text:p text:style-name="Body"><text:span text:style-name="EmBlue">• </text:span>Ma trận quyền, chính sách sinh trắc học/chữ ký số và device binding.</text:p>
      <text:h text:outline-level="2" text:style-name="H2">Tín hiệu tạo cơ hội bán hàng</text:h>
      <text:p text:style-name="Body"><text:span text:style-name="EmBlue">• </text:span>Nhiều lệnh chi hoặc payroll theo lô.</text:p>
      <text:p text:style-name="Body"><text:span text:style-name="EmBlue">• </text:span>Lãnh đạo cần phê duyệt từ xa.</text:p>
      <text:p text:style-name="Body"><text:span text:style-name="EmBlue">• </text:span>Doanh nghiệp cần audit maker–checker.</text:p>
      <text:p text:style-name="Body"><text:span text:style-name="EmBlue">• </text:span>Nhu cầu tra cứu tập trung tiền vay, bảo lãnh và L/C.</text:p>
      <text:h text:outline-level="2" text:style-name="H2">Câu hỏi discovery cho RM</text:h>
      <text:p text:style-name="Body"><text:span text:style-name="EmBlue">1. </text:span>Số cấp phê duyệt và hạn mức mỗi cấp?</text:p>
      <text:p text:style-name="Body"><text:span text:style-name="EmBlue">2. </text:span>Doanh nghiệp dùng chữ ký số hay Smart OTP?</text:p>
      <text:p text:style-name="Body"><text:span text:style-name="EmBlue">3. </text:span>Có cần upload file lô/ERP không?</text:p>
      <text:p text:style-name="Body"><text:span text:style-name="EmBlue">4. </text:span>Nhóm giao dịch nào cần triển khai trước?</text:p>
      <text:h text:outline-level="2" text:style-name="H2">Hành vi Multi-Agent</text:h>
      <text:p text:style-name="Body">Product Agent khuyến nghị gói số phù hợp; Legal/Operations kiểm quyền người dùng và hồ sơ. Action Executor chỉ tạo draft đăng ký, không tự cấp quyền hoặc thay hạn mức.</text:p>
      <table:table>
        <table:table-column table:style-name="AutoCol31"/>
        <table:table-column table:style-name="AutoCol32"/>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PAY-003, SHB-CORP-TAX-006, SHB-CORP-CARD-007, SHB-CORP-TFI-010</text:p>
          </table:table-cell>
          <table:table-cell table:style-name="Cell">
            <text:p text:style-name="BodySmall">SRC-SHB-002, SRC-SHB-005, SRC-SHB-006</text:p>
          </table:table-cell>
        </table:table-row>
      </table:table>
      <text:p text:style-name="BodyTiny"/>
      <table:table>
        <table:table-column table:style-name="CalloutCol33"/>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3</text:p>
      <text:h text:outline-level="1" text:style-name="H1">SHB-CORP-PAY-003 — Dịch vụ và gói chi trả lương</text:h>
      <table:table>
        <table:table-column table:style-name="AutoCol34"/>
        <table:table-column table:style-name="AutoCol35"/>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Thanh toán / Payroll</text:p>
          </table:table-cell>
        </table:table-row>
        <table:table-row>
          <table:table-cell table:style-name="CellLabel">
            <text:p text:style-name="BodySmall">Mức rủi ro</text:p>
          </table:table-cell>
          <table:table-cell table:style-name="CellAlt">
            <text:p text:style-name="BodySmall">Thấp–Trung bình</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Tự động hóa chi lương, giảm tiền mặt, giảm rủi ro và tạo trải nghiệm thống nhất cho doanh nghiệp và nhân viên.</text:p>
          </table:table-cell>
        </table:table-row>
      </table:table>
      <text:p text:style-name="BodyTiny"/>
      <text:h text:outline-level="2" text:style-name="H2">Khách hàng mục tiêu</text:h>
      <text:p text:style-name="Body"><text:span text:style-name="EmBlue">• </text:span>Doanh nghiệp có tài khoản SHB và nhu cầu trả lương định kỳ.</text:p>
      <text:p text:style-name="Body"><text:span text:style-name="EmBlue">• </text:span>Doanh nghiệp có số lượng nhân viên đủ lớn để cần file/lệnh theo lô.</text:p>
      <text:p text:style-name="Body"><text:span text:style-name="EmBlue">• </text:span>Doanh nghiệp muốn kết hợp ngân hàng số và phúc lợi tài chính cho nhân viên.</text:p>
      <text:h text:outline-level="2" text:style-name="H2">Thông tin công khai đã xác minh</text:h>
      <text:p text:style-name="Body"><text:span text:style-name="EmBlue">• </text:span>SHB mô tả dịch vụ là trích từ tài khoản doanh nghiệp hoặc thu tiền để chi trả lương theo danh sách.</text:p>
      <text:p text:style-name="Body"><text:span text:style-name="EmBlue">• </text:span>Đối tượng công khai là khách hàng doanh nghiệp có tài khoản tại SHB và có nhu cầu trả lương qua tài khoản.</text:p>
      <text:p text:style-name="Body"><text:span text:style-name="EmBlue">• </text:span>Gói chi trả lương công bố các ưu đãi cho doanh nghiệp và người lao động; ưu đãi là thông tin theo thời kỳ, không được hard-code làm điều kiện sản phẩm.</text:p>
      <text:h text:outline-level="2" text:style-name="H2">Điều kiện công khai / điều kiện tối thiểu</text:h>
      <text:p text:style-name="Body"><text:span text:style-name="EmBlue">• </text:span>Khách hàng có tài khoản doanh nghiệp tại SHB.</text:p>
      <text:p text:style-name="Body"><text:span text:style-name="EmBlue">• </text:span>Danh sách chi lương và người phê duyệt phải đi theo kênh/quy trình được đăng ký.</text:p>
      <text:h text:outline-level="2" text:style-name="H2">Thông tin bắt buộc lấy từ hệ thống nội bộ</text:h>
      <text:p text:style-name="Body"><text:span text:style-name="EmBlue">• </text:span>Biểu phí/gói ưu đãi còn hiệu lực.</text:p>
      <text:p text:style-name="Body"><text:span text:style-name="EmBlue">• </text:span>Định dạng file, cut-off time, hạn mức và SLA.</text:p>
      <text:p text:style-name="Body"><text:span text:style-name="EmBlue">• </text:span>Hợp đồng dịch vụ, quy trình xử lý sai/hoàn trả.</text:p>
      <text:h text:outline-level="2" text:style-name="H2">Tín hiệu tạo cơ hội bán hàng</text:h>
      <text:p text:style-name="Body"><text:span text:style-name="EmBlue">• </text:span>employees_count tăng hoặc lớn.</text:p>
      <text:p text:style-name="Body"><text:span text:style-name="EmBlue">• </text:span>Payroll process thủ công hoặc tiền mặt.</text:p>
      <text:p text:style-name="Body"><text:span text:style-name="EmBlue">• </text:span>Có pay_day cố định và nhiều tài khoản nhân viên ngoài SHB.</text:p>
      <text:h text:outline-level="2" text:style-name="H2">Câu hỏi discovery cho RM</text:h>
      <text:p text:style-name="Body"><text:span text:style-name="EmBlue">1. </text:span>Số lượng nhân viên và tổng quỹ lương?</text:p>
      <text:p text:style-name="Body"><text:span text:style-name="EmBlue">2. </text:span>Ngày trả lương/cut-off mong muốn?</text:p>
      <text:p text:style-name="Body"><text:span text:style-name="EmBlue">3. </text:span>Nguồn file từ ERP/HRM và định dạng?</text:p>
      <text:p text:style-name="Body"><text:span text:style-name="EmBlue">4. </text:span>Mô hình maker–checker?</text:p>
      <text:p text:style-name="Body"><text:span text:style-name="EmBlue">5. </text:span>Tỷ lệ nhân viên dự kiến mở tài khoản SHB?</text:p>
      <text:h text:outline-level="2" text:style-name="H2">Hành vi Multi-Agent</text:h>
      <text:p text:style-name="Body">Signal Agent chỉ dùng quy mô nhân sự như tín hiệu, không suy luận thu nhập cá nhân. Product Agent tạo payroll opportunity; Operations tạo checklist file, phê duyệt và test run.</text:p>
      <table:table>
        <table:table-column table:style-name="AutoCol36"/>
        <table:table-column table:style-name="AutoCol37"/>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DIGI-002, SHB-CORP-CARD-007, SHB-CORP-CASH-005</text:p>
          </table:table-cell>
          <table:table-cell table:style-name="Cell">
            <text:p text:style-name="BodySmall">SRC-SHB-003, SRC-SHB-004</text:p>
          </table:table-cell>
        </table:table-row>
      </table:table>
      <text:p text:style-name="BodyTiny"/>
      <table:table>
        <table:table-column table:style-name="CalloutCol38"/>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4</text:p>
      <text:h text:outline-level="1" text:style-name="H1">SHB-CORP-CASH-004 — Dịch vụ quản lý tài khoản tập trung</text:h>
      <table:table>
        <table:table-column table:style-name="AutoCol39"/>
        <table:table-column table:style-name="AutoCol40"/>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Cash pooling / Liquidity</text:p>
          </table:table-cell>
        </table:table-row>
        <table:table-row>
          <table:table-cell table:style-name="CellLabel">
            <text:p text:style-name="BodySmall">Mức rủi ro</text:p>
          </table:table-cell>
          <table:table-cell table:style-name="CellAlt">
            <text:p text:style-name="BodySmall">Trung bình</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Tập trung, điều chuyển và kiểm soát tiền giữa tài khoản chính với tài khoản phụ/đơn vị thành viên.</text:p>
          </table:table-cell>
        </table:table-row>
      </table:table>
      <text:p text:style-name="BodyTiny"/>
      <text:h text:outline-level="2" text:style-name="H2">Khách hàng mục tiêu</text:h>
      <text:p text:style-name="Body"><text:span text:style-name="EmBlue">• </text:span>Tập đoàn, tổng công ty, công ty mẹ–con.</text:p>
      <text:p text:style-name="Body"><text:span text:style-name="EmBlue">• </text:span>Tổng đại lý–đại lý hoặc doanh nghiệp có nhiều đơn vị/chi nhánh.</text:p>
      <text:p text:style-name="Body"><text:span text:style-name="EmBlue">• </text:span>Doanh nghiệp có thừa/thiếu vốn cục bộ và muốn tự động gom/điều tiền.</text:p>
      <text:h text:outline-level="2" text:style-name="H2">Thông tin công khai đã xác minh</text:h>
      <text:p text:style-name="Body"><text:span text:style-name="EmBlue">• </text:span>SHB mô tả giải pháp quản lý giữa một tài khoản chính và nhiều tài khoản phụ qua chuyển tiền tự động.</text:p>
      <text:p text:style-name="Body"><text:span text:style-name="EmBlue">• </text:span>Có thể thiết kế chuyển tự động từ đơn vị thành viên về công ty mẹ hoặc ngược lại.</text:p>
      <text:p text:style-name="Body"><text:span text:style-name="EmBlue">• </text:span>Tần suất công khai gồm hàng ngày hoặc nhiều ngày/lần; cuối ngày hoặc một/nhiều khung giờ.</text:p>
      <text:p text:style-name="Body"><text:span text:style-name="EmBlue">• </text:span>Hồ sơ công khai gồm hồ sơ mở tài khoản thanh toán, hợp đồng dịch vụ và xác nhận tham gia của các đơn vị thành viên có tư cách pháp nhân độc lập.</text:p>
      <text:h text:outline-level="2" text:style-name="H2">Điều kiện công khai / điều kiện tối thiểu</text:h>
      <text:p text:style-name="Body"><text:span text:style-name="EmBlue">• </text:span>Có cấu trúc tài khoản và các bên tham gia được xác nhận.</text:p>
      <text:p text:style-name="Body"><text:span text:style-name="EmBlue">• </text:span>Có thỏa thuận/ủy quyền và quy tắc điều chuyển hợp lệ.</text:p>
      <text:h text:outline-level="2" text:style-name="H2">Thông tin bắt buộc lấy từ hệ thống nội bộ</text:h>
      <text:p text:style-name="Body"><text:span text:style-name="EmBlue">• </text:span>Thuật toán sweep/target balance/zero balance được hỗ trợ.</text:p>
      <text:p text:style-name="Body"><text:span text:style-name="EmBlue">• </text:span>Biểu phí, cut-off, ngoại tệ, giao dịch liên pháp nhân và hạch toán.</text:p>
      <text:p text:style-name="Body"><text:span text:style-name="EmBlue">• </text:span>Approval matrix và giới hạn tài khoản.</text:p>
      <text:h text:outline-level="2" text:style-name="H2">Tín hiệu tạo cơ hội bán hàng</text:h>
      <text:p text:style-name="Body"><text:span text:style-name="EmBlue">• </text:span>accounts_count hoặc subsidiaries_count lớn.</text:p>
      <text:p text:style-name="Body"><text:span text:style-name="EmBlue">• </text:span>Dòng tiền phân tán; đơn vị có dư và thiếu tiền cùng lúc.</text:p>
      <text:p text:style-name="Body"><text:span text:style-name="EmBlue">• </text:span>CFO cần báo cáo tổng hợp và điều chuyển định kỳ.</text:p>
      <text:h text:outline-level="2" text:style-name="H2">Câu hỏi discovery cho RM</text:h>
      <text:p text:style-name="Body"><text:span text:style-name="EmBlue">1. </text:span>Bao nhiêu tài khoản và pháp nhân tham gia?</text:p>
      <text:p text:style-name="Body"><text:span text:style-name="EmBlue">2. </text:span>Hướng sweep, số dư mục tiêu và tần suất?</text:p>
      <text:p text:style-name="Body"><text:span text:style-name="EmBlue">3. </text:span>Có giao dịch ngược từ công ty mẹ xuống đơn vị không?</text:p>
      <text:p text:style-name="Body"><text:span text:style-name="EmBlue">4. </text:span>Ai phê duyệt cấu hình và thay đổi rule?</text:p>
      <text:h text:outline-level="2" text:style-name="H2">Hành vi Multi-Agent</text:h>
      <text:p text:style-name="Body">Product Agent phải dựng sơ đồ tài khoản; Legal kiểm thỏa thuận và quyền; Operations tạo implementation checklist. Không tự tạo cấu hình sweep.</text:p>
      <table:table>
        <table:table-column table:style-name="AutoCol41"/>
        <table:table-column table:style-name="AutoCol42"/>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ACC-001, SHB-CORP-DIGI-002, SHB-CORP-CASH-005</text:p>
          </table:table-cell>
          <table:table-cell table:style-name="Cell">
            <text:p text:style-name="BodySmall">SRC-SHB-007</text:p>
          </table:table-cell>
        </table:table-row>
      </table:table>
      <text:p text:style-name="BodyTiny"/>
      <table:table>
        <table:table-column table:style-name="CalloutCol43"/>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5</text:p>
      <text:h text:outline-level="1" text:style-name="H1">SHB-CORP-CASH-005 — Gói sản phẩm quản lý dòng tiền</text:h>
      <table:table>
        <table:table-column table:style-name="AutoCol44"/>
        <table:table-column table:style-name="AutoCol45"/>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Cash management bundle</text:p>
          </table:table-cell>
        </table:table-row>
        <table:table-row>
          <table:table-cell table:style-name="CellLabel">
            <text:p text:style-name="BodySmall">Mức rủi ro</text:p>
          </table:table-cell>
          <table:table-cell table:style-name="CellAlt">
            <text:p text:style-name="BodySmall">Trung bình–Cao</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Kết hợp quản lý phải thu, phải trả, thanh khoản, chuyển tiền, tiền gửi và hạn mức ngắn hạn trong một bundle.</text:p>
          </table:table-cell>
        </table:table-row>
      </table:table>
      <text:p text:style-name="BodyTiny"/>
      <text:h text:outline-level="2" text:style-name="H2">Khách hàng mục tiêu</text:h>
      <text:p text:style-name="Body"><text:span text:style-name="EmBlue">• </text:span>Doanh nghiệp có nhu cầu đồng thời về tài khoản, chuyển tiền, tiền gửi, thu NSNN, thấu chi và quản lý tài khoản tập trung.</text:p>
      <text:p text:style-name="Body"><text:span text:style-name="EmBlue">• </text:span>Doanh nghiệp muốn tối ưu phí và vận hành nhiều dòng sản phẩm.</text:p>
      <text:h text:outline-level="2" text:style-name="H2">Thông tin công khai đã xác minh</text:h>
      <text:p text:style-name="Body"><text:span text:style-name="EmBlue">• </text:span>SHB công bố gói quản lý dòng tiền phục vụ quản lý phải thu, phải trả và thanh khoản.</text:p>
      <text:p text:style-name="Body"><text:span text:style-name="EmBlue">• </text:span>Trang sản phẩm nêu điều kiện sử dụng tối thiểu 4/6 thành phần: tài khoản thanh toán, chuyển tiền trong/quốc tế, tiền gửi có kỳ hạn, thu hộ NSNN, thấu chi có tài sản bảo đảm, quản lý tài khoản tập trung.</text:p>
      <text:p text:style-name="Body"><text:span text:style-name="EmBlue">• </text:span>Gói có thể gắn với thấu chi; nhánh tín dụng phải được tách khỏi các dịch vụ giao dịch và không được coi là tự động đủ điều kiện.</text:p>
      <text:h text:outline-level="2" text:style-name="H2">Điều kiện công khai / điều kiện tối thiểu</text:h>
      <text:p text:style-name="Body"><text:span text:style-name="EmBlue">• </text:span>Phù hợp khi có ít nhất bốn nhu cầu/thành phần thực tế; không nên ép bundle nếu chỉ có một nhu cầu.</text:p>
      <text:p text:style-name="Body"><text:span text:style-name="EmBlue">• </text:span>Mỗi sản phẩm con giữ eligibility và source riêng.</text:p>
      <text:h text:outline-level="2" text:style-name="H2">Thông tin bắt buộc lấy từ hệ thống nội bộ</text:h>
      <text:p text:style-name="Body"><text:span text:style-name="EmBlue">• </text:span>Danh mục 4/6 còn hiệu lực, chính sách bundle và ưu đãi.</text:p>
      <text:p text:style-name="Body"><text:span text:style-name="EmBlue">• </text:span>Điều kiện tín dụng/thấu chi.</text:p>
      <text:p text:style-name="Body"><text:span text:style-name="EmBlue">• </text:span>Phí và thời hạn ưu đãi hiện hành.</text:p>
      <text:h text:outline-level="2" text:style-name="H2">Tín hiệu tạo cơ hội bán hàng</text:h>
      <text:p text:style-name="Body"><text:span text:style-name="EmBlue">• </text:span>Nhiều use case: payroll + supplier payment + liquidity + tax.</text:p>
      <text:p text:style-name="Body"><text:span text:style-name="EmBlue">• </text:span>Chi phí giao dịch lớn hoặc nhiều hệ thống.</text:p>
      <text:p text:style-name="Body"><text:span text:style-name="EmBlue">• </text:span>Nhu cầu vốn ngắn hạn song song với thanh toán.</text:p>
      <text:h text:outline-level="2" text:style-name="H2">Câu hỏi discovery cho RM</text:h>
      <text:p text:style-name="Body"><text:span text:style-name="EmBlue">1. </text:span>Bốn nhu cầu ưu tiên nhất là gì?</text:p>
      <text:p text:style-name="Body"><text:span text:style-name="EmBlue">2. </text:span>Sản phẩm nào khách hàng đã sử dụng?</text:p>
      <text:p text:style-name="Body"><text:span text:style-name="EmBlue">3. </text:span>Lưu lượng giao dịch và số tài khoản?</text:p>
      <text:p text:style-name="Body"><text:span text:style-name="EmBlue">4. </text:span>Nhánh nào cần triển khai trước?</text:p>
      <text:p text:style-name="Body"><text:span text:style-name="EmBlue">5. </text:span>Có nhu cầu tín dụng hay chỉ quản lý tiền?</text:p>
      <text:h text:outline-level="2" text:style-name="H2">Hành vi Multi-Agent</text:h>
      <text:p text:style-name="Body">Planner phân rã bundle thành các branch. Product đề xuất từng component; Legal chặn riêng credit branch; Operations tạo roadmap triển khai theo phase.</text:p>
      <table:table>
        <table:table-column table:style-name="AutoCol46"/>
        <table:table-column table:style-name="AutoCol47"/>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PAY-003, SHB-CORP-CASH-004, SHB-CORP-CREDIT-008, SHB-CORP-TAX-006</text:p>
          </table:table-cell>
          <table:table-cell table:style-name="Cell">
            <text:p text:style-name="BodySmall">SRC-SHB-008</text:p>
          </table:table-cell>
        </table:table-row>
      </table:table>
      <text:p text:style-name="BodyTiny"/>
      <table:table>
        <table:table-column table:style-name="CalloutCol48"/>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6</text:p>
      <text:h text:outline-level="1" text:style-name="H1">SHB-CORP-TAX-006 — Thanh toán thuế hải quan online 24/7</text:h>
      <table:table>
        <table:table-column table:style-name="AutoCol49"/>
        <table:table-column table:style-name="AutoCol50"/>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Government payments / Customs</text:p>
          </table:table-cell>
        </table:table-row>
        <table:table-row>
          <table:table-cell table:style-name="CellLabel">
            <text:p text:style-name="BodySmall">Mức rủi ro</text:p>
          </table:table-cell>
          <table:table-cell table:style-name="CellAlt">
            <text:p text:style-name="BodySmall">Trung bình</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Nộp thuế xuất nhập khẩu trực tuyến, giảm thời gian đến quầy và hỗ trợ thông quan.</text:p>
          </table:table-cell>
        </table:table-row>
      </table:table>
      <text:p text:style-name="BodyTiny"/>
      <text:h text:outline-level="2" text:style-name="H2">Khách hàng mục tiêu</text:h>
      <text:p text:style-name="Body"><text:span text:style-name="EmBlue">• </text:span>Doanh nghiệp có hoạt động xuất nhập khẩu.</text:p>
      <text:p text:style-name="Body"><text:span text:style-name="EmBlue">• </text:span>Doanh nghiệp cần nộp thuế ngoài giờ hoặc quản lý tập trung giao dịch hải quan.</text:p>
      <text:h text:outline-level="2" text:style-name="H2">Thông tin công khai đã xác minh</text:h>
      <text:p text:style-name="Body"><text:span text:style-name="EmBlue">• </text:span>SHB công bố dịch vụ nộp thuế hải quan hoàn toàn trực tuyến qua Internet Banking doanh nghiệp.</text:p>
      <text:p text:style-name="Body"><text:span text:style-name="EmBlue">• </text:span>Đối tượng công khai là khách hàng doanh nghiệp có hoạt động xuất nhập khẩu.</text:p>
      <text:p text:style-name="Body"><text:span text:style-name="EmBlue">• </text:span>Dịch vụ được mô tả là hỗ trợ thực hiện 24/7.</text:p>
      <text:h text:outline-level="2" text:style-name="H2">Điều kiện công khai / điều kiện tối thiểu</text:h>
      <text:p text:style-name="Body"><text:span text:style-name="EmBlue">• </text:span>Có tài khoản và Internet Banking doanh nghiệp.</text:p>
      <text:p text:style-name="Body"><text:span text:style-name="EmBlue">• </text:span>Thông tin nghĩa vụ thuế/hải quan phải chính xác và nằm trong phạm vi được hỗ trợ.</text:p>
      <text:h text:outline-level="2" text:style-name="H2">Thông tin bắt buộc lấy từ hệ thống nội bộ</text:h>
      <text:p text:style-name="Body"><text:span text:style-name="EmBlue">• </text:span>Danh mục cơ quan/kênh kết nối, cut-off và trạng thái đối soát.</text:p>
      <text:p text:style-name="Body"><text:span text:style-name="EmBlue">• </text:span>Phân quyền tạo–duyệt và biểu phí.</text:p>
      <text:p text:style-name="Body"><text:span text:style-name="EmBlue">• </text:span>Quy trình tra soát/hoàn giao dịch.</text:p>
      <text:h text:outline-level="2" text:style-name="H2">Tín hiệu tạo cơ hội bán hàng</text:h>
      <text:p text:style-name="Body"><text:span text:style-name="EmBlue">• </text:span>import_export = true.</text:p>
      <text:p text:style-name="Body"><text:span text:style-name="EmBlue">• </text:span>Nhiều tờ khai hoặc nộp thuế thường xuyên.</text:p>
      <text:p text:style-name="Body"><text:span text:style-name="EmBlue">• </text:span>Pain point về thời gian thông quan.</text:p>
      <text:h text:outline-level="2" text:style-name="H2">Câu hỏi discovery cho RM</text:h>
      <text:p text:style-name="Body"><text:span text:style-name="EmBlue">1. </text:span>Loại thuế và tần suất nộp?</text:p>
      <text:p text:style-name="Body"><text:span text:style-name="EmBlue">2. </text:span>Nguồn dữ liệu tờ khai từ hệ thống nào?</text:p>
      <text:p text:style-name="Body"><text:span text:style-name="EmBlue">3. </text:span>Ai tạo và ai phê duyệt?</text:p>
      <text:p text:style-name="Body"><text:span text:style-name="EmBlue">4. </text:span>Cần báo cáo/đối soát ra sao?</text:p>
      <text:h text:outline-level="2" text:style-name="H2">Hành vi Multi-Agent</text:h>
      <text:p text:style-name="Body">Operations Agent phải kiểm tra payload thuế và cho RM preview; không suy đoán số tờ khai, mã cơ quan hoặc số tiền.</text:p>
      <table:table>
        <table:table-column table:style-name="AutoCol51"/>
        <table:table-column table:style-name="AutoCol52"/>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DIGI-002, SHB-CORP-TFI-010, SHB-CORP-FX-012</text:p>
          </table:table-cell>
          <table:table-cell table:style-name="Cell">
            <text:p text:style-name="BodySmall">SRC-SHB-009</text:p>
          </table:table-cell>
        </table:table-row>
      </table:table>
      <text:p text:style-name="BodyTiny"/>
      <table:table>
        <table:table-column table:style-name="CalloutCol53"/>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7</text:p>
      <text:h text:outline-level="1" text:style-name="H1">SHB-CORP-CARD-007 — SHB Mastercard Business Platinum</text:h>
      <table:table>
        <table:table-column table:style-name="AutoCol54"/>
        <table:table-column table:style-name="AutoCol55"/>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Thẻ tín dụng doanh nghiệp</text:p>
          </table:table-cell>
        </table:table-row>
        <table:table-row>
          <table:table-cell table:style-name="CellLabel">
            <text:p text:style-name="BodySmall">Mức rủi ro</text:p>
          </table:table-cell>
          <table:table-cell table:style-name="CellAlt">
            <text:p text:style-name="BodySmall">Cao</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Cấp phương tiện chi tiêu doanh nghiệp có kiểm soát, giảm tiền mặt và hỗ trợ vốn ngắn hạn cho chi phí vận hành.</text:p>
          </table:table-cell>
        </table:table-row>
      </table:table>
      <text:p text:style-name="BodyTiny"/>
      <text:h text:outline-level="2" text:style-name="H2">Khách hàng mục tiêu</text:h>
      <text:p text:style-name="Body"><text:span text:style-name="EmBlue">• </text:span>Doanh nghiệp có chi phí công tác, mua sắm hoặc thanh toán định kỳ.</text:p>
      <text:p text:style-name="Body"><text:span text:style-name="EmBlue">• </text:span>Doanh nghiệp cần nhiều thẻ cho cán bộ với cơ chế quản lý và thanh toán tập trung.</text:p>
      <text:h text:outline-level="2" text:style-name="H2">Thông tin công khai đã xác minh</text:h>
      <text:p text:style-name="Body"><text:span text:style-name="EmBlue">• </text:span>SHB mô tả thẻ Mastercard Business Platinum theo mô hình “thanh toán trước, chi trả sau”, hỗ trợ quản lý dòng tiền và giảm rủi ro tiền mặt.</text:p>
      <text:p text:style-name="Body"><text:span text:style-name="EmBlue">• </text:span>Dư nợ có thể được thanh toán qua trích nợ tự động, quầy, ngân hàng khác, ATM và SHB Corporate Mobile.</text:p>
      <text:p text:style-name="Body"><text:span text:style-name="EmBlue">• </text:span>Người tạo lệnh và người kiểm soát/phê duyệt có thể thao tác qua Corporate Mobile/Internet Banking.</text:p>
      <text:p text:style-name="Body"><text:span text:style-name="EmBlue">• </text:span>SHB có biểu phí thẻ doanh nghiệp công bố ngày 24/06/2025; fee engine phải lấy bản còn hiệu lực.</text:p>
      <text:h text:outline-level="2" text:style-name="H2">Điều kiện công khai / điều kiện tối thiểu</text:h>
      <text:p text:style-name="Body"><text:span text:style-name="EmBlue">• </text:span>Phát hành và hạn mức phải theo quy định tín dụng/thẻ hiện hành.</text:p>
      <text:p text:style-name="Body"><text:span text:style-name="EmBlue">• </text:span>Người dùng thẻ, mục đích chi tiêu và trách nhiệm thanh toán phải được xác định.</text:p>
      <text:h text:outline-level="2" text:style-name="H2">Thông tin bắt buộc lấy từ hệ thống nội bộ</text:h>
      <text:p text:style-name="Body"><text:span text:style-name="EmBlue">• </text:span>Eligibility, hạn mức, tài sản bảo đảm/ký quỹ nếu có.</text:p>
      <text:p text:style-name="Body"><text:span text:style-name="EmBlue">• </text:span>MCC restrictions, sub-limit, số thẻ và control policy.</text:p>
      <text:p text:style-name="Body"><text:span text:style-name="EmBlue">• </text:span>Biểu phí, lãi suất, grace period và điều khoản hiện hành.</text:p>
      <text:h text:outline-level="2" text:style-name="H2">Tín hiệu tạo cơ hội bán hàng</text:h>
      <text:p text:style-name="Body"><text:span text:style-name="EmBlue">• </text:span>travel_spend hoặc procurement_spend cao.</text:p>
      <text:p text:style-name="Body"><text:span text:style-name="EmBlue">• </text:span>Nhiều reimbursement tiền mặt.</text:p>
      <text:p text:style-name="Body"><text:span text:style-name="EmBlue">• </text:span>Nhu cầu thẻ phụ và kiểm soát theo nhân viên.</text:p>
      <text:h text:outline-level="2" text:style-name="H2">Câu hỏi discovery cho RM</text:h>
      <text:p text:style-name="Body"><text:span text:style-name="EmBlue">1. </text:span>Mục đích chi tiêu và số lượng người dùng?</text:p>
      <text:p text:style-name="Body"><text:span text:style-name="EmBlue">2. </text:span>Hạn mức tổng và hạn mức từng thẻ dự kiến?</text:p>
      <text:p text:style-name="Body"><text:span text:style-name="EmBlue">3. </text:span>Cơ chế sao kê/thanh toán và kế toán?</text:p>
      <text:p text:style-name="Body"><text:span text:style-name="EmBlue">4. </text:span>Có cần hạn chế MCC/giao dịch quốc tế?</text:p>
      <text:h text:outline-level="2" text:style-name="H2">Hành vi Multi-Agent</text:h>
      <text:p text:style-name="Body">Product Agent có thể tạo candidate; Legal/Credit phải kiểm eligibility. UI phải ghi rõ “chưa phê duyệt hạn mức”.</text:p>
      <table:table>
        <table:table-column table:style-name="AutoCol56"/>
        <table:table-column table:style-name="AutoCol57"/>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DIGI-002, SHB-CORP-PAY-003, SHB-CORP-CASH-005</text:p>
          </table:table-cell>
          <table:table-cell table:style-name="Cell">
            <text:p text:style-name="BodySmall">SRC-SHB-010, SRC-SHB-011, SRC-SHB-012</text:p>
          </table:table-cell>
        </table:table-row>
      </table:table>
      <text:p text:style-name="BodyTiny"/>
      <table:table>
        <table:table-column table:style-name="CalloutCol58"/>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8</text:p>
      <text:h text:outline-level="1" text:style-name="H1">SHB-CORP-CREDIT-008 — Thấu chi online và giải pháp vốn lưu động</text:h>
      <table:table>
        <table:table-column table:style-name="AutoCol59"/>
        <table:table-column table:style-name="AutoCol60"/>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Credit / Working capital</text:p>
          </table:table-cell>
        </table:table-row>
        <table:table-row>
          <table:table-cell table:style-name="CellLabel">
            <text:p text:style-name="BodySmall">Mức rủi ro</text:p>
          </table:table-cell>
          <table:table-cell table:style-name="CellAlt">
            <text:p text:style-name="BodySmall">Rất cao</text:p>
          </table:table-cell>
        </table:table-row>
        <table:table-row>
          <table:table-cell table:style-name="CellLabel">
            <text:p text:style-name="BodySmall">Nhãn nguồn</text:p>
          </table:table-cell>
          <table:table-cell table:style-name="Cell">
            <text:p text:style-name="BodySmall">VERIFIED_PUBLIC; HUMAN DECISION REQUIRED</text:p>
          </table:table-cell>
        </table:table-row>
        <table:table-row>
          <table:table-cell table:style-name="CellLabel">
            <text:p text:style-name="BodySmall">Business need</text:p>
          </table:table-cell>
          <table:table-cell table:style-name="CellAlt">
            <text:p text:style-name="BodySmall">Bù đắp thiếu hụt vốn lưu động ngắn hạn theo chu kỳ kinh doanh hoặc dòng tiền.</text:p>
          </table:table-cell>
        </table:table-row>
      </table:table>
      <text:p text:style-name="BodyTiny"/>
      <text:h text:outline-level="2" text:style-name="H2">Khách hàng mục tiêu</text:h>
      <text:p text:style-name="Body"><text:span text:style-name="EmBlue">• </text:span>Doanh nghiệp có nhu cầu vốn ngắn hạn, dòng tiền về có thể quan sát và hồ sơ tín dụng phù hợp.</text:p>
      <text:p text:style-name="Body"><text:span text:style-name="EmBlue">• </text:span>Khách hàng hiện hữu có tài khoản, ngân hàng điện tử và quan hệ tín dụng tại SHB.</text:p>
      <text:h text:outline-level="2" text:style-name="H2">Thông tin công khai đã xác minh</text:h>
      <text:p text:style-name="Body"><text:span text:style-name="EmBlue">• </text:span>Sản phẩm Thấu chi Online công bố hạn mức đến 5 tỷ đồng, thời hạn tối đa 12 tháng và yêu cầu tài khoản doanh nghiệp, Internet Banking và khoản vay còn hiệu lực tại SHB.</text:p>
      <text:p text:style-name="Body"><text:span text:style-name="EmBlue">• </text:span>Trang tín dụng doanh nghiệp 2026 công bố sản phẩm Cấp tín dụng nhanh cho doanh nghiệp siêu nhỏ doanh thu tối đa 100 tỷ đồng/năm, hạn mức đến 10 tỷ đồng, thời hạn tối đa 12 tháng và thông điệp phê duyệt trong 24 giờ làm việc.</text:p>
      <text:p text:style-name="Body"><text:span text:style-name="EmBlue">• </text:span>Các con số trên là điều khoản marketing theo sản phẩm cụ thể; không được chuyển thành rule chung hoặc cam kết với mọi khách hàng.</text:p>
      <text:h text:outline-level="2" text:style-name="H2">Điều kiện công khai / điều kiện tối thiểu</text:h>
      <text:p text:style-name="Body"><text:span text:style-name="EmBlue">• </text:span>Chỉ tạo opportunity và pre-check; quyết định cấp tín dụng thuộc người/hệ thống có thẩm quyền.</text:p>
      <text:p text:style-name="Body"><text:span text:style-name="EmBlue">• </text:span>Unknown về UBO, BCTC, mục đích vốn, dòng tiền hoặc tài sản bảo đảm phải là need_info/review, không phải pass.</text:p>
      <text:h text:outline-level="2" text:style-name="H2">Thông tin bắt buộc lấy từ hệ thống nội bộ</text:h>
      <text:p text:style-name="Body"><text:span text:style-name="EmBlue">• </text:span>Credit policy, score/rating, CIC, AML/KYC, UBO, BCTC và authority matrix.</text:p>
      <text:p text:style-name="Body"><text:span text:style-name="EmBlue">• </text:span>Hạn mức, lãi suất, tài sản bảo đảm, covenant và pricing.</text:p>
      <text:p text:style-name="Body"><text:span text:style-name="EmBlue">• </text:span>Tính đủ điều kiện theo từng product/version.</text:p>
      <text:h text:outline-level="2" text:style-name="H2">Tín hiệu tạo cơ hội bán hàng</text:h>
      <text:p text:style-name="Body"><text:span text:style-name="EmBlue">• </text:span>seasonal_gap hoặc supplier_payment_peak.</text:p>
      <text:p text:style-name="Body"><text:span text:style-name="EmBlue">• </text:span>Dòng tiền vào ổn định nhưng thiếu hụt ngắn hạn.</text:p>
      <text:p text:style-name="Body"><text:span text:style-name="EmBlue">• </text:span>Khách hàng đã có active loan và sử dụng Internet Banking.</text:p>
      <text:h text:outline-level="2" text:style-name="H2">Câu hỏi discovery cho RM</text:h>
      <text:p text:style-name="Body"><text:span text:style-name="EmBlue">1. </text:span>Mục đích vốn, số tiền, thời hạn và thời điểm cần vốn?</text:p>
      <text:p text:style-name="Body"><text:span text:style-name="EmBlue">2. </text:span>Nguồn trả nợ và dòng tiền về đâu?</text:p>
      <text:p text:style-name="Body"><text:span text:style-name="EmBlue">3. </text:span>BCTC/UBO/CIC đã sẵn sàng chưa?</text:p>
      <text:p text:style-name="Body"><text:span text:style-name="EmBlue">4. </text:span>Tài sản bảo đảm hoặc hợp đồng đầu ra?</text:p>
      <text:h text:outline-level="2" text:style-name="H2">Hành vi Multi-Agent</text:h>
      <text:p text:style-name="Body">Product Agent chỉ nêu candidate. Legal/Credit Engine chạy rule deterministic. Evidence Validator chặn mọi claim “được duyệt”, “chắc chắn cấp” hoặc lãi suất/hạn mức không có nguồn current.</text:p>
      <table:table>
        <table:table-column table:style-name="AutoCol61"/>
        <table:table-column table:style-name="AutoCol62"/>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CASH-005, SHB-CORP-PAY-003, SHB-CORP-TFE-011</text:p>
          </table:table-cell>
          <table:table-cell table:style-name="Cell">
            <text:p text:style-name="BodySmall">SRC-SHB-013, SRC-SHB-014, SRC-SHB-015</text:p>
          </table:table-cell>
        </table:table-row>
      </table:table>
      <text:p text:style-name="BodyTiny"/>
      <table:table>
        <table:table-column table:style-name="CalloutCol63"/>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09</text:p>
      <text:h text:outline-level="1" text:style-name="H1">SHB-CORP-GUAR-009 — Bảo lãnh ngân hàng</text:h>
      <table:table>
        <table:table-column table:style-name="AutoCol64"/>
        <table:table-column table:style-name="AutoCol65"/>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Guarantee</text:p>
          </table:table-cell>
        </table:table-row>
        <table:table-row>
          <table:table-cell table:style-name="CellLabel">
            <text:p text:style-name="BodySmall">Mức rủi ro</text:p>
          </table:table-cell>
          <table:table-cell table:style-name="CellAlt">
            <text:p text:style-name="BodySmall">Rất cao</text:p>
          </table:table-cell>
        </table:table-row>
        <table:table-row>
          <table:table-cell table:style-name="CellLabel">
            <text:p text:style-name="BodySmall">Nhãn nguồn</text:p>
          </table:table-cell>
          <table:table-cell table:style-name="Cell">
            <text:p text:style-name="BodySmall">VERIFIED_PUBLIC + REGULATORY</text:p>
          </table:table-cell>
        </table:table-row>
        <table:table-row>
          <table:table-cell table:style-name="CellLabel">
            <text:p text:style-name="BodySmall">Business need</text:p>
          </table:table-cell>
          <table:table-cell table:style-name="CellAlt">
            <text:p text:style-name="BodySmall">Tăng độ tin cậy và đáp ứng nghĩa vụ bảo đảm trong đấu thầu, hợp đồng, thanh toán, ứng trước, thuế, bảo hành hoặc vay vốn.</text:p>
          </table:table-cell>
        </table:table-row>
      </table:table>
      <text:p text:style-name="BodyTiny"/>
      <text:h text:outline-level="2" text:style-name="H2">Khách hàng mục tiêu</text:h>
      <text:p text:style-name="Body"><text:span text:style-name="EmBlue">• </text:span>Nhà thầu, nhà cung cấp, doanh nghiệp xuất nhập khẩu hoặc doanh nghiệp có nghĩa vụ cần ngân hàng bảo lãnh.</text:p>
      <text:h text:outline-level="2" text:style-name="H2">Thông tin công khai đã xác minh</text:h>
      <text:p text:style-name="Body"><text:span text:style-name="EmBlue">• </text:span>SHB công bố nhiều loại bảo lãnh: dự thầu, thực hiện hợp đồng, thanh toán, hoàn trả tiền ứng trước, bảo đảm chất lượng, nộp thuế và vay vốn.</text:p>
      <text:p text:style-name="Body"><text:span text:style-name="EmBlue">• </text:span>Các trang sản phẩm mô tả bảo lãnh được phát hành dưới dạng thư bảo lãnh và hồ sơ thực hiện theo quy định SHB.</text:p>
      <text:p text:style-name="Body"><text:span text:style-name="EmBlue">• </text:span>Văn bản hợp nhất 36/VBHN-NHNN ngày 07/11/2024 hợp nhất quy định về bảo lãnh ngân hàng và phải được dùng thay vì chỉ dựa vào Thông tư 11/2022 đã hết hiệu lực toàn bộ từ 01/04/2025.</text:p>
      <text:h text:outline-level="2" text:style-name="H2">Điều kiện công khai / điều kiện tối thiểu</text:h>
      <text:p text:style-name="Body"><text:span text:style-name="EmBlue">• </text:span>Xác định đúng loại bảo lãnh, bên nhận, nghĩa vụ, số tiền, thời hạn và điều kiện gọi bảo lãnh.</text:p>
      <text:p text:style-name="Body"><text:span text:style-name="EmBlue">• </text:span>Phải có thẩm định và phê duyệt tín dụng/bảo lãnh theo thẩm quyền.</text:p>
      <text:h text:outline-level="2" text:style-name="H2">Thông tin bắt buộc lấy từ hệ thống nội bộ</text:h>
      <text:p text:style-name="Body"><text:span text:style-name="EmBlue">• </text:span>Mẫu thư, clause library, counter-indemnity, ký quỹ/TSBĐ, pricing và approval matrix.</text:p>
      <text:p text:style-name="Body"><text:span text:style-name="EmBlue">• </text:span>Danh sách cấm vận/PEP, legal review và quy trình phát hành.</text:p>
      <text:h text:outline-level="2" text:style-name="H2">Tín hiệu tạo cơ hội bán hàng</text:h>
      <text:p text:style-name="Body"><text:span text:style-name="EmBlue">• </text:span>tender_id hoặc contract requires bank guarantee.</text:p>
      <text:p text:style-name="Body"><text:span text:style-name="EmBlue">• </text:span>Khách hàng nhận tạm ứng hoặc phải bảo hành.</text:p>
      <text:p text:style-name="Body"><text:span text:style-name="EmBlue">• </text:span>Nghĩa vụ thuế nhập khẩu cần bảo lãnh.</text:p>
      <text:h text:outline-level="2" text:style-name="H2">Câu hỏi discovery cho RM</text:h>
      <text:p text:style-name="Body"><text:span text:style-name="EmBlue">1. </text:span>Loại bảo lãnh và nghĩa vụ được bảo đảm?</text:p>
      <text:p text:style-name="Body"><text:span text:style-name="EmBlue">2. </text:span>Bên nhận, số tiền, thời hạn, ngôn ngữ và luật áp dụng?</text:p>
      <text:p text:style-name="Body"><text:span text:style-name="EmBlue">3. </text:span>Mẫu thư của đối tác hay mẫu ngân hàng?</text:p>
      <text:p text:style-name="Body"><text:span text:style-name="EmBlue">4. </text:span>Ký quỹ/TSBĐ và deadline phát hành?</text:p>
      <text:h text:outline-level="2" text:style-name="H2">Hành vi Multi-Agent</text:h>
      <text:p text:style-name="Body">Planner tách Legal, Credit và Operations. Legal không được tự chỉnh clause. Action chỉ tạo draft request, không phát hành thư.</text:p>
      <table:table>
        <table:table-column table:style-name="AutoCol66"/>
        <table:table-column table:style-name="AutoCol67"/>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TFI-010, SHB-CORP-CREDIT-008, SHB-CORP-TAX-006</text:p>
          </table:table-cell>
          <table:table-cell table:style-name="Cell">
            <text:p text:style-name="BodySmall">SRC-SHB-016, SRC-SHB-017, SRC-SHB-018, SRC-SHB-019, SRC-REG-002</text:p>
          </table:table-cell>
        </table:table-row>
      </table:table>
      <text:p text:style-name="BodyTiny"/>
      <table:table>
        <table:table-column table:style-name="CalloutCol68"/>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10</text:p>
      <text:h text:outline-level="1" text:style-name="H1">SHB-CORP-TFI-010 — Tài trợ thương mại nhập khẩu</text:h>
      <table:table>
        <table:table-column table:style-name="AutoCol69"/>
        <table:table-column table:style-name="AutoCol70"/>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Trade finance – Import</text:p>
          </table:table-cell>
        </table:table-row>
        <table:table-row>
          <table:table-cell table:style-name="CellLabel">
            <text:p text:style-name="BodySmall">Mức rủi ro</text:p>
          </table:table-cell>
          <table:table-cell table:style-name="CellAlt">
            <text:p text:style-name="BodySmall">Rất cao</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Bảo đảm thanh toán và tối ưu vốn cho giao dịch nhập khẩu thông qua L/C, UPAS/negotiation hoặc chuyển tiền quốc tế.</text:p>
          </table:table-cell>
        </table:table-row>
      </table:table>
      <text:p text:style-name="BodyTiny"/>
      <text:h text:outline-level="2" text:style-name="H2">Khách hàng mục tiêu</text:h>
      <text:p text:style-name="Body"><text:span text:style-name="EmBlue">• </text:span>Doanh nghiệp nhập khẩu hàng hóa/dịch vụ có hợp đồng ngoại thương.</text:p>
      <text:p text:style-name="Body"><text:span text:style-name="EmBlue">• </text:span>Doanh nghiệp cần trả chậm cho mình nhưng nhà xuất khẩu nhận tiền sớm.</text:p>
      <text:h text:outline-level="2" text:style-name="H2">Thông tin công khai đã xác minh</text:h>
      <text:p text:style-name="Body"><text:span text:style-name="EmBlue">• </text:span>SHB công bố các dịch vụ L/C nhập khẩu, UPAS L/C, nhờ thu CAD nhập khẩu, chuyển tiền quốc tế và L/C có điều khoản thương lượng thanh toán.</text:p>
      <text:p text:style-name="Body"><text:span text:style-name="EmBlue">• </text:span>L/C có điều khoản thương lượng cho phép khách hàng trả chậm trong khi nhà xuất khẩu có thể được thanh toán sớm; thời gian trả chậm công bố lên tới 365 ngày.</text:p>
      <text:p text:style-name="Body"><text:span text:style-name="EmBlue">• </text:span>Hồ sơ công khai gồm hợp đồng nhập khẩu, đơn đề nghị phát hành L/C theo mẫu và hồ sơ khác theo hướng dẫn.</text:p>
      <text:h text:outline-level="2" text:style-name="H2">Điều kiện công khai / điều kiện tối thiểu</text:h>
      <text:p text:style-name="Body"><text:span text:style-name="EmBlue">• </text:span>Có giao dịch thương mại hợp pháp và chứng từ chứng minh mục đích.</text:p>
      <text:p text:style-name="Body"><text:span text:style-name="EmBlue">• </text:span>Tài trợ hoặc phát hành L/C cần hạn mức/phê duyệt phù hợp.</text:p>
      <text:h text:outline-level="2" text:style-name="H2">Thông tin bắt buộc lấy từ hệ thống nội bộ</text:h>
      <text:p text:style-name="Body"><text:span text:style-name="EmBlue">• </text:span>Country/bank risk, sanctions, commodity restrictions và UCP/ISBP handling.</text:p>
      <text:p text:style-name="Body"><text:span text:style-name="EmBlue">• </text:span>Margin, credit line, pricing, tenor và approval.</text:p>
      <text:p text:style-name="Body"><text:span text:style-name="EmBlue">• </text:span>Document checklist theo phương thức thanh toán.</text:p>
      <text:h text:outline-level="2" text:style-name="H2">Tín hiệu tạo cơ hội bán hàng</text:h>
      <text:p text:style-name="Body"><text:span text:style-name="EmBlue">• </text:span>import_contract = true.</text:p>
      <text:p text:style-name="Body"><text:span text:style-name="EmBlue">• </text:span>Nhà xuất khẩu yêu cầu L/C hoặc khách hàng cần deferred payment.</text:p>
      <text:p text:style-name="Body"><text:span text:style-name="EmBlue">• </text:span>FX payment date và shipment schedule đã biết.</text:p>
      <text:h text:outline-level="2" text:style-name="H2">Câu hỏi discovery cho RM</text:h>
      <text:p text:style-name="Body"><text:span text:style-name="EmBlue">1. </text:span>Hợp đồng, mặt hàng, quốc gia và đối tác?</text:p>
      <text:p text:style-name="Body"><text:span text:style-name="EmBlue">2. </text:span>Phương thức thanh toán, trị giá, đồng tiền và tenor?</text:p>
      <text:p text:style-name="Body"><text:span text:style-name="EmBlue">3. </text:span>Cần tài trợ hay chỉ dịch vụ L/C?</text:p>
      <text:p text:style-name="Body"><text:span text:style-name="EmBlue">4. </text:span>Ngày giao hàng và bộ chứng từ dự kiến?</text:p>
      <text:h text:outline-level="2" text:style-name="H2">Hành vi Multi-Agent</text:h>
      <text:p text:style-name="Body">Trade Product Agent retrieve product; Legal/Sanctions kiểm giao dịch và các bên; FX Agent đề xuất hedge nếu có exposure; RM duyệt draft.</text:p>
      <table:table>
        <table:table-column table:style-name="AutoCol71"/>
        <table:table-column table:style-name="AutoCol72"/>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FX-012, SHB-CORP-GUAR-009, SHB-CORP-TAX-006</text:p>
          </table:table-cell>
          <table:table-cell table:style-name="Cell">
            <text:p text:style-name="BodySmall">SRC-SHB-020, SRC-SHB-021</text:p>
          </table:table-cell>
        </table:table-row>
      </table:table>
      <text:p text:style-name="BodyTiny"/>
      <table:table>
        <table:table-column table:style-name="CalloutCol73"/>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11</text:p>
      <text:h text:outline-level="1" text:style-name="H1">SHB-CORP-TFE-011 — Tài trợ thương mại xuất khẩu</text:h>
      <table:table>
        <table:table-column table:style-name="AutoCol74"/>
        <table:table-column table:style-name="AutoCol75"/>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Trade finance – Export</text:p>
          </table:table-cell>
        </table:table-row>
        <table:table-row>
          <table:table-cell table:style-name="CellLabel">
            <text:p text:style-name="BodySmall">Mức rủi ro</text:p>
          </table:table-cell>
          <table:table-cell table:style-name="CellAlt">
            <text:p text:style-name="BodySmall">Rất cao</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Cấp vốn trước giao hàng hoặc ứng trước tiền từ bộ chứng từ sau giao hàng.</text:p>
          </table:table-cell>
        </table:table-row>
      </table:table>
      <text:p text:style-name="BodyTiny"/>
      <text:h text:outline-level="2" text:style-name="H2">Khách hàng mục tiêu</text:h>
      <text:p text:style-name="Body"><text:span text:style-name="EmBlue">• </text:span>Doanh nghiệp xuất khẩu có đơn hàng/hợp đồng và nhu cầu vốn lưu động.</text:p>
      <text:p text:style-name="Body"><text:span text:style-name="EmBlue">• </text:span>Doanh nghiệp đã giao hàng, có bộ chứng từ L/C, nhờ thu hoặc CAD và đang chờ thanh toán.</text:p>
      <text:h text:outline-level="2" text:style-name="H2">Thông tin công khai đã xác minh</text:h>
      <text:p text:style-name="Body"><text:span text:style-name="EmBlue">• </text:span>Tài trợ xuất khẩu trước giao hàng công bố tỷ lệ đến 90% nhu cầu vốn và thời hạn đến 12 tháng.</text:p>
      <text:p text:style-name="Body"><text:span text:style-name="EmBlue">• </text:span>Tài trợ hợp đồng xuất khẩu T/T công bố đến 100% nhu cầu vốn, tối đa 80% giá trị hợp đồng và thời hạn đến 9 tháng.</text:p>
      <text:p text:style-name="Body"><text:span text:style-name="EmBlue">• </text:span>Chiết khấu bộ chứng từ công bố tỷ lệ đến 98%, thời gian tối đa 6 tháng, loại tiền VND/USD và thời gian xử lý hồ sơ 2 giờ.</text:p>
      <text:p text:style-name="Body"><text:span text:style-name="EmBlue">• </text:span>Cho vay bảo đảm bằng bộ chứng từ xuất khẩu công bố tỷ lệ đến 98% giá trị bộ chứng từ và tối đa 6 tháng.</text:p>
      <text:h text:outline-level="2" text:style-name="H2">Điều kiện công khai / điều kiện tối thiểu</text:h>
      <text:p text:style-name="Body"><text:span text:style-name="EmBlue">• </text:span>Phải xác định stage: trước giao hàng hay sau giao hàng.</text:p>
      <text:p text:style-name="Body"><text:span text:style-name="EmBlue">• </text:span>Có hợp đồng/đơn hàng hoặc bộ chứng từ phù hợp và đáp ứng quy định tín dụng.</text:p>
      <text:h text:outline-level="2" text:style-name="H2">Thông tin bắt buộc lấy từ hệ thống nội bộ</text:h>
      <text:p text:style-name="Body"><text:span text:style-name="EmBlue">• </text:span>Buyer/bank/country risk, recourse, discrepancy policy, credit line và collateral.</text:p>
      <text:p text:style-name="Body"><text:span text:style-name="EmBlue">• </text:span>Pricing, currency, document verification và approval.</text:p>
      <text:h text:outline-level="2" text:style-name="H2">Tín hiệu tạo cơ hội bán hàng</text:h>
      <text:p text:style-name="Body"><text:span text:style-name="EmBlue">• </text:span>export_order hoặc export_documents.</text:p>
      <text:p text:style-name="Body"><text:span text:style-name="EmBlue">• </text:span>working_capital_need trước sản xuất/giao hàng.</text:p>
      <text:p text:style-name="Body"><text:span text:style-name="EmBlue">• </text:span>waiting_for_receivable sau giao hàng.</text:p>
      <text:h text:outline-level="2" text:style-name="H2">Câu hỏi discovery cho RM</text:h>
      <text:p text:style-name="Body"><text:span text:style-name="EmBlue">1. </text:span>Đã giao hàng hay chưa?</text:p>
      <text:p text:style-name="Body"><text:span text:style-name="EmBlue">2. </text:span>Phương thức thanh toán L/C, D/P, D/A, CAD hay T/T?</text:p>
      <text:p text:style-name="Body"><text:span text:style-name="EmBlue">3. </text:span>Giá trị hợp đồng/bộ chứng từ và ngày đáo hạn?</text:p>
      <text:p text:style-name="Body"><text:span text:style-name="EmBlue">4. </text:span>Có discrepancy hoặc buyer/country risk?</text:p>
      <text:h text:outline-level="2" text:style-name="H2">Hành vi Multi-Agent</text:h>
      <text:p text:style-name="Body">Need Agent phân loại stage; Product Agent chọn pre-shipment/post-shipment; Legal/Credit xử lý high-risk. Không dùng tỷ lệ công bố làm approval rule.</text:p>
      <table:table>
        <table:table-column table:style-name="AutoCol76"/>
        <table:table-column table:style-name="AutoCol77"/>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FX-012, SHB-CORP-CREDIT-008, SHB-CORP-GUAR-009</text:p>
          </table:table-cell>
          <table:table-cell table:style-name="Cell">
            <text:p text:style-name="BodySmall">SRC-SHB-022, SRC-SHB-023, SRC-SHB-024, SRC-SHB-025</text:p>
          </table:table-cell>
        </table:table-row>
      </table:table>
      <text:p text:style-name="BodyTiny"/>
      <table:table>
        <table:table-column table:style-name="CalloutCol78"/>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p text:style-name="SectionKicker">HỒ SƠ SẢN PHẨM 12</text:p>
      <text:h text:outline-level="1" text:style-name="H1">SHB-CORP-FX-012 — Ngoại hối Spot / Forward / Swap</text:h>
      <table:table>
        <table:table-column table:style-name="AutoCol79"/>
        <table:table-column table:style-name="AutoCol80"/>
        <table:table-row>
          <table:table-cell table:style-name="CellHeader">
            <text:p text:style-name="BodySmall">Thuộc tính</text:p>
          </table:table-cell>
          <table:table-cell table:style-name="CellHeader">
            <text:p text:style-name="BodySmall">Giá trị</text:p>
          </table:table-cell>
        </table:table-row>
        <table:table-row>
          <table:table-cell table:style-name="CellLabel">
            <text:p text:style-name="BodySmall">Danh mục</text:p>
          </table:table-cell>
          <table:table-cell table:style-name="Cell">
            <text:p text:style-name="BodySmall">FX &amp; Treasury</text:p>
          </table:table-cell>
        </table:table-row>
        <table:table-row>
          <table:table-cell table:style-name="CellLabel">
            <text:p text:style-name="BodySmall">Mức rủi ro</text:p>
          </table:table-cell>
          <table:table-cell table:style-name="CellAlt">
            <text:p text:style-name="BodySmall">Rất cao</text:p>
          </table:table-cell>
        </table:table-row>
        <table:table-row>
          <table:table-cell table:style-name="CellLabel">
            <text:p text:style-name="BodySmall">Nhãn nguồn</text:p>
          </table:table-cell>
          <table:table-cell table:style-name="Cell">
            <text:p text:style-name="BodySmall">VERIFIED_PUBLIC</text:p>
          </table:table-cell>
        </table:table-row>
        <table:table-row>
          <table:table-cell table:style-name="CellLabel">
            <text:p text:style-name="BodySmall">Business need</text:p>
          </table:table-cell>
          <table:table-cell table:style-name="CellAlt">
            <text:p text:style-name="BodySmall">Thanh toán ngoại tệ, khóa tỷ giá tương lai hoặc hoán đổi nguồn tiền giữa hai đồng tiền.</text:p>
          </table:table-cell>
        </table:table-row>
      </table:table>
      <text:p text:style-name="BodyTiny"/>
      <text:h text:outline-level="2" text:style-name="H2">Khách hàng mục tiêu</text:h>
      <text:p text:style-name="Body"><text:span text:style-name="EmBlue">• </text:span>Doanh nghiệp xuất nhập khẩu hoặc có nghĩa vụ/nguồn thu ngoại tệ.</text:p>
      <text:p text:style-name="Body"><text:span text:style-name="EmBlue">• </text:span>Doanh nghiệp cần quản trị rủi ro tỷ giá và dòng tiền ngoại tệ.</text:p>
      <text:h text:outline-level="2" text:style-name="H2">Thông tin công khai đã xác minh</text:h>
      <text:p text:style-name="Body"><text:span text:style-name="EmBlue">• </text:span>SPOT là giao dịch mua/bán ngoại tệ theo tỷ giá giao ngay và hoàn tất trong vòng hai ngày làm việc tiếp theo.</text:p>
      <text:p text:style-name="Body"><text:span text:style-name="EmBlue">• </text:span>FORWARD là cam kết mua/bán ngoại tệ theo tỷ giá xác định hôm nay và thanh toán trong tương lai; SHB công bố kỳ hạn 3–365 ngày.</text:p>
      <text:p text:style-name="Body"><text:span text:style-name="EmBlue">• </text:span>SWAP là mua và bán cùng một lượng ngoại tệ với hai ngày thanh toán khác nhau; SHB công bố kỳ hạn 3–365 ngày.</text:p>
      <text:p text:style-name="Body"><text:span text:style-name="EmBlue">• </text:span>Hồ sơ công khai gồm hợp đồng giao dịch và chứng từ chứng minh mục đích mua/bán ngoại tệ.</text:p>
      <text:h text:outline-level="2" text:style-name="H2">Điều kiện công khai / điều kiện tối thiểu</text:h>
      <text:p text:style-name="Body"><text:span text:style-name="EmBlue">• </text:span>Có nhu cầu ngoại tệ hợp pháp và chứng từ chứng minh mục đích.</text:p>
      <text:p text:style-name="Body"><text:span text:style-name="EmBlue">• </text:span>Pricing/tỷ giá phải lấy realtime từ treasury system, không lưu cứng trong RAG.</text:p>
      <text:h text:outline-level="2" text:style-name="H2">Thông tin bắt buộc lấy từ hệ thống nội bộ</text:h>
      <text:p text:style-name="Body"><text:span text:style-name="EmBlue">• </text:span>Counterparty limit, product suitability, market risk, settlement instructions và dealing authority.</text:p>
      <text:p text:style-name="Body"><text:span text:style-name="EmBlue">• </text:span>Tỷ giá, swap points, cut-off, collateral/margin nếu có.</text:p>
      <text:h text:outline-level="2" text:style-name="H2">Tín hiệu tạo cơ hội bán hàng</text:h>
      <text:p text:style-name="Body"><text:span text:style-name="EmBlue">• </text:span>foreign_currency_payable hoặc receivable.</text:p>
      <text:p text:style-name="Body"><text:span text:style-name="EmBlue">• </text:span>payment_date/receipt_date trong tương lai.</text:p>
      <text:p text:style-name="Body"><text:span text:style-name="EmBlue">• </text:span>Mismatch giữa đồng tiền nắm giữ và đồng tiền cần sử dụng.</text:p>
      <text:h text:outline-level="2" text:style-name="H2">Câu hỏi discovery cho RM</text:h>
      <text:p text:style-name="Body"><text:span text:style-name="EmBlue">1. </text:span>Đồng tiền, số tiền, chiều mua/bán và ngày giá trị?</text:p>
      <text:p text:style-name="Body"><text:span text:style-name="EmBlue">2. </text:span>Mục đích và chứng từ?</text:p>
      <text:p text:style-name="Body"><text:span text:style-name="EmBlue">3. </text:span>Khách hàng muốn thanh toán ngay hay khóa tỷ giá?</text:p>
      <text:p text:style-name="Body"><text:span text:style-name="EmBlue">4. </text:span>Có nguồn ngoại tệ đối ứng cho swap không?</text:p>
      <text:h text:outline-level="2" text:style-name="H2">Hành vi Multi-Agent</text:h>
      <text:p text:style-name="Body">FX Agent chỉ phân loại nhu cầu và tạo RFQ draft. Mọi quote phải realtime và có expiry; không để LLM sinh tỷ giá.</text:p>
      <table:table>
        <table:table-column table:style-name="AutoCol81"/>
        <table:table-column table:style-name="AutoCol82"/>
        <table:table-row>
          <table:table-cell table:style-name="CellHeader">
            <text:p text:style-name="BodySmall">Cross-sell / bundle candidates</text:p>
          </table:table-cell>
          <table:table-cell table:style-name="CellHeader">
            <text:p text:style-name="BodySmall">Nguồn xác nhận</text:p>
          </table:table-cell>
        </table:table-row>
        <table:table-row>
          <table:table-cell table:style-name="CellLabel">
            <text:p text:style-name="BodySmall">SHB-CORP-TFI-010, SHB-CORP-TFE-011, SHB-CORP-CASH-005</text:p>
          </table:table-cell>
          <table:table-cell table:style-name="Cell">
            <text:p text:style-name="BodySmall">SRC-SHB-026, SRC-SHB-027, SRC-SHB-028</text:p>
          </table:table-cell>
        </table:table-row>
      </table:table>
      <text:p text:style-name="BodyTiny"/>
      <table:table>
        <table:table-column table:style-name="CalloutCol83"/>
        <table:table-row>
          <table:table-cell table:style-name="CellWarn">
            <text:p text:style-name="BodySmall"><text:span text:style-name="Strong">Safe-answer rule</text:span></text:p>
            <text:p text:style-name="BodySmall">Agent phải phân biệt giữa “sản phẩm có thể phù hợp để RM tư vấn” và “khách hàng đã đủ điều kiện/được phê duyệt”. Chỉ vế đầu được phép sinh từ public-source corpus.</text:p>
          </table:table-cell>
        </table:table-row>
      </table:table>
      <text:p text:style-name="BodyTiny"/>
      <text:p text:style-name="PageBreak"/>
      <text:h text:outline-level="1" text:style-name="H1">15. Benchmark công khai từ BIDV và Vietcombank</text:h>
      <table:table>
        <table:table-column table:style-name="CalloutCol84"/>
        <table:table-row>
          <table:table-cell table:style-name="CellWarn">
            <text:p text:style-name="BodySmall"><text:span text:style-name="Strong">Cách sử dụng</text:span></text:p>
            <text:p text:style-name="BodySmall">Các capability dưới đây giúp kiểm tra độ đầy đủ của taxonomy và thiết kế roadmap. Product Agent không được đề xuất chúng dưới thương hiệu SHB nếu catalog nội bộ SHB chưa xác nhận.</text:p>
          </table:table-cell>
        </table:table-row>
      </table:table>
      <text:p text:style-name="BodyTiny"/>
      <text:h text:outline-level="2" text:style-name="H2">15.1. BENCH-CORP-REC-013 — Quản lý khoản phải thu và tài khoản định danh</text:h>
      <table:table>
        <table:table-column table:style-name="AutoCol85"/>
        <table:table-column table:style-name="AutoCol86"/>
        <table:table-row>
          <table:table-cell table:style-name="CellHeader">
            <text:p text:style-name="BodySmall">Khía cạnh</text:p>
          </table:table-cell>
          <table:table-cell table:style-name="CellHeader">
            <text:p text:style-name="BodySmall">Thông tin benchmark</text:p>
          </table:table-cell>
        </table:table-row>
        <table:table-row>
          <table:table-cell table:style-name="CellLabel">
            <text:p text:style-name="BodySmall">Vietcombank</text:p>
          </table:table-cell>
          <table:table-cell table:style-name="Cell">
            <text:p text:style-name="BodySmall">Công bố dịch vụ tài khoản phụ liên kết tài khoản chính để định danh giao dịch ghi có và tạo báo cáo phân loại doanh thu; đồng thời có thu hộ theo bảng kê.</text:p>
          </table:table-cell>
        </table:table-row>
        <table:table-row>
          <table:table-cell table:style-name="CellLabel">
            <text:p text:style-name="BodySmall">BIDV</text:p>
          </table:table-cell>
          <table:table-cell table:style-name="CellAlt">
            <text:p text:style-name="BodySmall">BIDV iBank công bố quản lý tài khoản định danh, truy vấn báo cáo thu hộ và kho thanh toán hóa đơn online.</text:p>
          </table:table-cell>
        </table:table-row>
        <table:table-row>
          <table:table-cell table:style-name="CellLabel">
            <text:p text:style-name="BodySmall">Use case</text:p>
          </table:table-cell>
          <table:table-cell table:style-name="Cell">
            <text:p text:style-name="BodySmall">Doanh nghiệp có nhiều đại lý/khách hàng và khó đối soát khoản phải thu theo đối tác, ngành hàng, dự án hoặc địa bàn.</text:p>
          </table:table-cell>
        </table:table-row>
        <table:table-row>
          <table:table-cell table:style-name="CellLabel">
            <text:p text:style-name="BodySmall">MVP data fields</text:p>
          </table:table-cell>
          <table:table-cell table:style-name="CellAlt">
            <text:p text:style-name="BodySmall">virtual_account_id, payer_id, invoice_id, expected_amount, received_amount, reconciliation_status.</text:p>
          </table:table-cell>
        </table:table-row>
        <table:table-row>
          <table:table-cell table:style-name="CellLabel">
            <text:p text:style-name="BodySmall">SHB action</text:p>
          </table:table-cell>
          <table:table-cell table:style-name="Cell">
            <text:p text:style-name="BodySmall">Chỉ tạo capability gap hoặc “cần xác nhận sản phẩm thu hộ/tài khoản định danh của SHB”; không tự gán product_id SHB.</text:p>
          </table:table-cell>
        </table:table-row>
        <table:table-row>
          <table:table-cell table:style-name="CellLabel">
            <text:p text:style-name="BodySmall">Sources</text:p>
          </table:table-cell>
          <table:table-cell table:style-name="CellAlt">
            <text:p text:style-name="BodySmall">SRC-VCB-001; SRC-BIDV-001; SRC-BIDV-002</text:p>
          </table:table-cell>
        </table:table-row>
      </table:table>
      <text:p text:style-name="BodyTiny"/>
      <text:h text:outline-level="2" text:style-name="H2">15.2. BENCH-CORP-ERP-014 — Ngân hàng số nâng cao và kết nối ERP</text:h>
      <table:table>
        <table:table-column table:style-name="AutoCol87"/>
        <table:table-column table:style-name="AutoCol88"/>
        <table:table-row>
          <table:table-cell table:style-name="CellHeader">
            <text:p text:style-name="BodySmall">Khía cạnh</text:p>
          </table:table-cell>
          <table:table-cell table:style-name="CellHeader">
            <text:p text:style-name="BodySmall">Thông tin benchmark</text:p>
          </table:table-cell>
        </table:table-row>
        <table:table-row>
          <table:table-cell table:style-name="CellLabel">
            <text:p text:style-name="BodySmall">BIDV iBank</text:p>
          </table:table-cell>
          <table:table-cell table:style-name="Cell">
            <text:p text:style-name="BodySmall">Công bố hệ sinh thái App/Web, maker–checker, quản lý dòng tiền, tài trợ thương mại, ngoại tệ và kết nối ERP qua BIDV iConnect.</text:p>
          </table:table-cell>
        </table:table-row>
        <table:table-row>
          <table:table-cell table:style-name="CellLabel">
            <text:p text:style-name="BodySmall">Vietcombank</text:p>
          </table:table-cell>
          <table:table-cell table:style-name="CellAlt">
            <text:p text:style-name="BodySmall">VCB DigiBiz hỗ trợ App/Web và mô hình lập–duyệt 1 cấp/2 cấp; VCB CashUp được mô tả là one-stop shop cho doanh nghiệp quy mô lớn, phân quyền phức tạp và trả lương.</text:p>
          </table:table-cell>
        </table:table-row>
        <table:table-row>
          <table:table-cell table:style-name="CellLabel">
            <text:p text:style-name="BodySmall">Use case</text:p>
          </table:table-cell>
          <table:table-cell table:style-name="Cell">
            <text:p text:style-name="BodySmall">Doanh nghiệp có ERP, số lượng giao dịch lớn, nhiều đơn vị và cần host-to-host/API/file integration.</text:p>
          </table:table-cell>
        </table:table-row>
        <table:table-row>
          <table:table-cell table:style-name="CellLabel">
            <text:p text:style-name="BodySmall">MVP data fields</text:p>
          </table:table-cell>
          <table:table-cell table:style-name="CellAlt">
            <text:p text:style-name="BodySmall">erp_type, integration_mode, file_format, callback, approval_levels, daily_volume, reconciliation_need.</text:p>
          </table:table-cell>
        </table:table-row>
        <table:table-row>
          <table:table-cell table:style-name="CellLabel">
            <text:p text:style-name="BodySmall">SHB action</text:p>
          </table:table-cell>
          <table:table-cell table:style-name="Cell">
            <text:p text:style-name="BodySmall">Đưa vào discovery và roadmap; chỉ cam kết khi có product/API catalog nội bộ SHB.</text:p>
          </table:table-cell>
        </table:table-row>
        <table:table-row>
          <table:table-cell table:style-name="CellLabel">
            <text:p text:style-name="BodySmall">Sources</text:p>
          </table:table-cell>
          <table:table-cell table:style-name="CellAlt">
            <text:p text:style-name="BodySmall">SRC-BIDV-001; SRC-BIDV-002; SRC-VCB-002; SRC-VCB-003</text:p>
          </table:table-cell>
        </table:table-row>
      </table:table>
      <text:p text:style-name="BodyTiny"/>
      <text:p text:style-name="PageBreak"/>
      <text:h text:outline-level="1" text:style-name="H1">16. Playbook bundle cho B2B Sales</text:h>
      <text:h text:outline-level="2" text:style-name="H2">16.1. Manufacturing 500 nhân sự – Hero case</text:h>
      <table:table>
        <table:table-column table:style-name="AutoCol89"/>
        <table:table-column table:style-name="AutoCol90"/>
        <table:table-row>
          <table:table-cell table:style-name="CellHeader">
            <text:p text:style-name="BodySmall">Dữ liệu</text:p>
          </table:table-cell>
          <table:table-cell table:style-name="CellHeader">
            <text:p text:style-name="BodySmall">Giá trị synthetic</text:p>
          </table:table-cell>
        </table:table-row>
        <table:table-row>
          <table:table-cell table:style-name="CellLabel">
            <text:p text:style-name="BodySmall">Quy mô</text:p>
          </table:table-cell>
          <table:table-cell table:style-name="Cell">
            <text:p text:style-name="BodySmall">500 nhân viên; doanh thu 120 tỷ VND/năm</text:p>
          </table:table-cell>
        </table:table-row>
        <table:table-row>
          <table:table-cell table:style-name="CellLabel">
            <text:p text:style-name="BodySmall">Vận hành</text:p>
          </table:table-cell>
          <table:table-cell table:style-name="CellAlt">
            <text:p text:style-name="BodySmall">1.200 lệnh chi nhà cung cấp/tháng; 6 tài khoản tại 3 ngân hàng; ERP xuất file</text:p>
          </table:table-cell>
        </table:table-row>
        <table:table-row>
          <table:table-cell table:style-name="CellLabel">
            <text:p text:style-name="BodySmall">Nhu cầu</text:p>
          </table:table-cell>
          <table:table-cell table:style-name="Cell">
            <text:p text:style-name="BodySmall">Payroll + supplier payment + cash concentration + vốn lưu động 20 tỷ/6 tháng</text:p>
          </table:table-cell>
        </table:table-row>
        <table:table-row>
          <table:table-cell table:style-name="CellLabel">
            <text:p text:style-name="BodySmall">Hồ sơ</text:p>
          </table:table-cell>
          <table:table-cell table:style-name="CellAlt">
            <text:p text:style-name="BodySmall">ĐKKD hợp lệ; thiếu UBO và BCTC gần nhất</text:p>
          </table:table-cell>
        </table:table-row>
      </table:table>
      <text:p text:style-name="BodyTiny"/>
      <table:table>
        <table:table-column table:style-name="AutoCol91"/>
        <table:table-column table:style-name="AutoCol92"/>
        <table:table-column table:style-name="AutoCol93"/>
        <table:table-column table:style-name="AutoCol94"/>
        <table:table-row>
          <table:table-cell table:style-name="CellHeader">
            <text:p text:style-name="BodyTiny">Branch</text:p>
          </table:table-cell>
          <table:table-cell table:style-name="CellHeader">
            <text:p text:style-name="BodyTiny">Candidate</text:p>
          </table:table-cell>
          <table:table-cell table:style-name="CellHeader">
            <text:p text:style-name="BodyTiny">Kết quả demo</text:p>
          </table:table-cell>
          <table:table-cell table:style-name="CellHeader">
            <text:p text:style-name="BodyTiny">Next-best-action</text:p>
          </table:table-cell>
        </table:table-row>
        <table:table-row>
          <table:table-cell table:style-name="Cell">
            <text:p text:style-name="BodyTiny">Payroll</text:p>
          </table:table-cell>
          <table:table-cell table:style-name="Cell">
            <text:p text:style-name="BodyTiny">SHB-CORP-PAY-003</text:p>
          </table:table-cell>
          <table:table-cell table:style-name="Cell">
            <text:p text:style-name="BodyTiny">READY_TO_PREPARE</text:p>
          </table:table-cell>
          <table:table-cell table:style-name="Cell">
            <text:p text:style-name="BodyTiny">Xác nhận pay day, file và approval.</text:p>
          </table:table-cell>
        </table:table-row>
        <table:table-row>
          <table:table-cell table:style-name="CellAlt">
            <text:p text:style-name="BodyTiny">Digital</text:p>
          </table:table-cell>
          <table:table-cell table:style-name="CellAlt">
            <text:p text:style-name="BodyTiny">SHB-CORP-DIGI-002</text:p>
          </table:table-cell>
          <table:table-cell table:style-name="CellAlt">
            <text:p text:style-name="BodyTiny">READY_TO_PREPARE</text:p>
          </table:table-cell>
          <table:table-cell table:style-name="CellAlt">
            <text:p text:style-name="BodyTiny">Cấu hình maker–checker và test file.</text:p>
          </table:table-cell>
        </table:table-row>
        <table:table-row>
          <table:table-cell table:style-name="Cell">
            <text:p text:style-name="BodyTiny">Cash concentration</text:p>
          </table:table-cell>
          <table:table-cell table:style-name="Cell">
            <text:p text:style-name="BodyTiny">SHB-CORP-CASH-004</text:p>
          </table:table-cell>
          <table:table-cell table:style-name="Cell">
            <text:p text:style-name="BodyTiny">NEED_INFORMATION</text:p>
          </table:table-cell>
          <table:table-cell table:style-name="Cell">
            <text:p text:style-name="BodyTiny">Lập sơ đồ tài khoản, pháp nhân, sweep rule.</text:p>
          </table:table-cell>
        </table:table-row>
        <table:table-row>
          <table:table-cell table:style-name="CellAlt">
            <text:p text:style-name="BodyTiny">Working capital</text:p>
          </table:table-cell>
          <table:table-cell table:style-name="CellAlt">
            <text:p text:style-name="BodyTiny">SHB-CORP-CREDIT-008</text:p>
          </table:table-cell>
          <table:table-cell table:style-name="CellAlt">
            <text:p text:style-name="BodyTiny">NEED_INFORMATION</text:p>
          </table:table-cell>
          <table:table-cell table:style-name="CellAlt">
            <text:p text:style-name="BodyTiny">Thu thập UBO và BCTC; không cam kết hạn mức.</text:p>
          </table:table-cell>
        </table:table-row>
      </table:table>
      <text:p text:style-name="BodyTiny"/>
      <text:h text:outline-level="2" text:style-name="H2">16.2. Import–export SME</text:h>
      <table:table>
        <table:table-column table:style-name="AutoCol95"/>
        <table:table-column table:style-name="AutoCol96"/>
        <table:table-column table:style-name="AutoCol97"/>
        <table:table-row>
          <table:table-cell table:style-name="CellHeader">
            <text:p text:style-name="BodyTiny">Need</text:p>
          </table:table-cell>
          <table:table-cell table:style-name="CellHeader">
            <text:p text:style-name="BodyTiny">Candidate products</text:p>
          </table:table-cell>
          <table:table-cell table:style-name="CellHeader">
            <text:p text:style-name="BodyTiny">Logic</text:p>
          </table:table-cell>
        </table:table-row>
        <table:table-row>
          <table:table-cell table:style-name="Cell">
            <text:p text:style-name="BodyTiny">Nhập khẩu + trả chậm</text:p>
          </table:table-cell>
          <table:table-cell table:style-name="Cell">
            <text:p text:style-name="BodyTiny">SHB-CORP-TFI-010 + SHB-CORP-FX-012</text:p>
          </table:table-cell>
          <table:table-cell table:style-name="Cell">
            <text:p text:style-name="BodyTiny">L/C/UPAS candidate; FX exposure theo ngày thanh toán.</text:p>
          </table:table-cell>
        </table:table-row>
        <table:table-row>
          <table:table-cell table:style-name="CellAlt">
            <text:p text:style-name="BodyTiny">Nộp thuế hải quan</text:p>
          </table:table-cell>
          <table:table-cell table:style-name="CellAlt">
            <text:p text:style-name="BodyTiny">SHB-CORP-TAX-006 + SHB-CORP-DIGI-002</text:p>
          </table:table-cell>
          <table:table-cell table:style-name="CellAlt">
            <text:p text:style-name="BodyTiny">Online 24/7; cần dữ liệu tờ khai và quyền duyệt.</text:p>
          </table:table-cell>
        </table:table-row>
        <table:table-row>
          <table:table-cell table:style-name="Cell">
            <text:p text:style-name="BodyTiny">Bảo đảm hợp đồng</text:p>
          </table:table-cell>
          <table:table-cell table:style-name="Cell">
            <text:p text:style-name="BodyTiny">SHB-CORP-GUAR-009</text:p>
          </table:table-cell>
          <table:table-cell table:style-name="Cell">
            <text:p text:style-name="BodyTiny">Chọn đúng loại bảo lãnh và clause.</text:p>
          </table:table-cell>
        </table:table-row>
        <table:table-row>
          <table:table-cell table:style-name="CellAlt">
            <text:p text:style-name="BodyTiny">Xuất khẩu chờ tiền</text:p>
          </table:table-cell>
          <table:table-cell table:style-name="CellAlt">
            <text:p text:style-name="BodyTiny">SHB-CORP-TFE-011</text:p>
          </table:table-cell>
          <table:table-cell table:style-name="CellAlt">
            <text:p text:style-name="BodyTiny">Phân biệt pre-shipment và post-shipment.</text:p>
          </table:table-cell>
        </table:table-row>
      </table:table>
      <text:p text:style-name="BodyTiny"/>
      <text:h text:outline-level="2" text:style-name="H2">16.3. Tập đoàn nhiều công ty con</text:h>
      <table:table>
        <table:table-column table:style-name="AutoCol98"/>
        <table:table-column table:style-name="AutoCol99"/>
        <table:table-column table:style-name="AutoCol100"/>
        <table:table-row>
          <table:table-cell table:style-name="CellHeader">
            <text:p text:style-name="BodyTiny">Pain point</text:p>
          </table:table-cell>
          <table:table-cell table:style-name="CellHeader">
            <text:p text:style-name="BodyTiny">Candidate</text:p>
          </table:table-cell>
          <table:table-cell table:style-name="CellHeader">
            <text:p text:style-name="BodyTiny">Điểm cần kiểm soát</text:p>
          </table:table-cell>
        </table:table-row>
        <table:table-row>
          <table:table-cell table:style-name="Cell">
            <text:p text:style-name="BodyTiny">Tiền phân tán</text:p>
          </table:table-cell>
          <table:table-cell table:style-name="Cell">
            <text:p text:style-name="BodyTiny">SHB-CORP-CASH-004</text:p>
          </table:table-cell>
          <table:table-cell table:style-name="Cell">
            <text:p text:style-name="BodyTiny">Pháp nhân, authority, sweep direction, target balance.</text:p>
          </table:table-cell>
        </table:table-row>
        <table:table-row>
          <table:table-cell table:style-name="CellAlt">
            <text:p text:style-name="BodyTiny">Nhiều giao dịch</text:p>
          </table:table-cell>
          <table:table-cell table:style-name="CellAlt">
            <text:p text:style-name="BodyTiny">SHB-CORP-DIGI-002</text:p>
          </table:table-cell>
          <table:table-cell table:style-name="CellAlt">
            <text:p text:style-name="BodyTiny">3 cấp phê duyệt, file/ERP, audit.</text:p>
          </table:table-cell>
        </table:table-row>
        <table:table-row>
          <table:table-cell table:style-name="Cell">
            <text:p text:style-name="BodyTiny">Nhiều nhu cầu cùng lúc</text:p>
          </table:table-cell>
          <table:table-cell table:style-name="Cell">
            <text:p text:style-name="BodyTiny">SHB-CORP-CASH-005</text:p>
          </table:table-cell>
          <table:table-cell table:style-name="Cell">
            <text:p text:style-name="BodyTiny">Bundle 4/6; tách credit branch.</text:p>
          </table:table-cell>
        </table:table-row>
        <table:table-row>
          <table:table-cell table:style-name="CellAlt">
            <text:p text:style-name="BodyTiny">Đối soát thu</text:p>
          </table:table-cell>
          <table:table-cell table:style-name="CellAlt">
            <text:p text:style-name="BodyTiny">BENCH-CORP-REC-013</text:p>
          </table:table-cell>
          <table:table-cell table:style-name="CellAlt">
            <text:p text:style-name="BodyTiny">Benchmark; cần xác nhận SHB internal product.</text:p>
          </table:table-cell>
        </table:table-row>
      </table:table>
      <text:p text:style-name="BodyTiny"/>
      <text:p text:style-name="PageBreak"/>
      <text:h text:outline-level="1" text:style-name="H1">17. Pipeline Multi-Agent và contract user-facing</text:h>
      <text:p text:style-name="Body"><text:span text:style-name="EmBlue">1. </text:span>Context Engine: tải employee scope, customer/case, products held, documents và open tasks.</text:p>
      <text:p text:style-name="Body"><text:span text:style-name="EmBlue">2. </text:span>Need &amp; Signal Analyst: biến fact thành signal và need hypothesis; ghi provenance/confidence.</text:p>
      <text:p text:style-name="Body"><text:span text:style-name="EmBlue">3. </text:span>Opportunity Generator: tạo một opportunity object cho mỗi need, không gộp pass/fail toàn case.</text:p>
      <text:p text:style-name="Body"><text:span text:style-name="EmBlue">4. </text:span>Product Agent: retrieve product records, xếp hạng candidate và alternatives.</text:p>
      <text:p text:style-name="Body"><text:span text:style-name="EmBlue">5. </text:span>Eligibility/Legal Agent: chạy rule deterministic, xác định missing/review/block theo branch.</text:p>
      <text:p text:style-name="Body"><text:span text:style-name="EmBlue">6. </text:span>Operations Agent: tạo checklist, owner, SLA, draft email/task và dedup key.</text:p>
      <text:p text:style-name="Body"><text:span text:style-name="EmBlue">7. </text:span>Evidence Validator: kiểm claim, source, version và effective date.</text:p>
      <text:p text:style-name="Body"><text:span text:style-name="EmBlue">8. </text:span>Decision Brief Composer: nén output thành màn hình RM có thể duyệt trong 30–60 giây.</text:p>
      <text:p text:style-name="Body"><text:span text:style-name="EmBlue">9. </text:span>RM Approval: chọn branch/action, xem payload diff và ký approval.</text:p>
      <text:p text:style-name="Body"><text:span text:style-name="EmBlue">10. </text:span>Controlled Executor: thực thi một lần với idempotency key và audit receipt.</text:p>
      <text:h text:outline-level="2" text:style-name="H2">17.1. Decision Brief tối thiểu</text:h>
      <table:table>
        <table:table-column table:style-name="AutoCol101"/>
        <table:table-column table:style-name="AutoCol102"/>
        <table:table-row>
          <table:table-cell table:style-name="CellHeader">
            <text:p text:style-name="BodySmall">Khối UI</text:p>
          </table:table-cell>
          <table:table-cell table:style-name="CellHeader">
            <text:p text:style-name="BodySmall">Field bắt buộc</text:p>
          </table:table-cell>
        </table:table-row>
        <table:table-row>
          <table:table-cell table:style-name="CellLabel">
            <text:p text:style-name="BodySmall">Context header</text:p>
          </table:table-cell>
          <table:table-cell table:style-name="Cell">
            <text:p text:style-name="BodySmall">customer_id, legal_name, segment, industry, RM, active_case, data freshness, permission scope</text:p>
          </table:table-cell>
        </table:table-row>
        <table:table-row>
          <table:table-cell table:style-name="CellLabel">
            <text:p text:style-name="BodySmall">Need summary</text:p>
          </table:table-cell>
          <table:table-cell table:style-name="CellAlt">
            <text:p text:style-name="BodySmall">confirmed facts, source, confidence, corrections</text:p>
          </table:table-cell>
        </table:table-row>
        <table:table-row>
          <table:table-cell table:style-name="CellLabel">
            <text:p text:style-name="BodySmall">Opportunity card</text:p>
          </table:table-cell>
          <table:table-cell table:style-name="Cell">
            <text:p text:style-name="BodySmall">opportunity_id, product_id, need, match reasons, status, missing info, risk, source IDs</text:p>
          </table:table-cell>
        </table:table-row>
        <table:table-row>
          <table:table-cell table:style-name="CellLabel">
            <text:p text:style-name="BodySmall">Action center</text:p>
          </table:table-cell>
          <table:table-cell table:style-name="CellAlt">
            <text:p text:style-name="BodySmall">tasks, owner, SLA, email/case draft, reuse/create status</text:p>
          </table:table-cell>
        </table:table-row>
        <table:table-row>
          <table:table-cell table:style-name="CellLabel">
            <text:p text:style-name="BodySmall">Approval modal</text:p>
          </table:table-cell>
          <table:table-cell table:style-name="Cell">
            <text:p text:style-name="BodySmall">selected scope, payload diff, unresolved warnings, approver, token expiry, idempotency key</text:p>
          </table:table-cell>
        </table:table-row>
        <table:table-row>
          <table:table-cell table:style-name="CellLabel">
            <text:p text:style-name="BodySmall">Receipt</text:p>
          </table:table-cell>
          <table:table-cell table:style-name="CellAlt">
            <text:p text:style-name="BodySmall">created/updated/reused/blocked counts and audit trace ID</text:p>
          </table:table-cell>
        </table:table-row>
      </table:table>
      <text:p text:style-name="BodyTiny"/>
      <text:h text:outline-level="2" text:style-name="H2">17.2. Quy tắc trả lời</text:h>
      <table:table>
        <table:table-column table:style-name="AutoCol103"/>
        <table:table-column table:style-name="AutoCol104"/>
        <table:table-column table:style-name="AutoCol105"/>
        <table:table-row>
          <table:table-cell table:style-name="CellHeader">
            <text:p text:style-name="BodyTiny">Tình huống</text:p>
          </table:table-cell>
          <table:table-cell table:style-name="CellHeader">
            <text:p text:style-name="BodyTiny">Câu trả lời được phép</text:p>
          </table:table-cell>
          <table:table-cell table:style-name="CellHeader">
            <text:p text:style-name="BodyTiny">Câu trả lời bị cấm</text:p>
          </table:table-cell>
        </table:table-row>
        <table:table-row>
          <table:table-cell table:style-name="Cell">
            <text:p text:style-name="BodyTiny">Nguồn đầy đủ</text:p>
          </table:table-cell>
          <table:table-cell table:style-name="Cell">
            <text:p text:style-name="BodyTiny">“Sản phẩm X có thể phù hợp vì A/B; nguồn Y.”</text:p>
          </table:table-cell>
          <table:table-cell table:style-name="Cell">
            <text:p text:style-name="BodyTiny">“Khách hàng chắc chắn được duyệt.”</text:p>
          </table:table-cell>
        </table:table-row>
        <table:table-row>
          <table:table-cell table:style-name="CellAlt">
            <text:p text:style-name="BodyTiny">Thiếu phí/lãi suất</text:p>
          </table:table-cell>
          <table:table-cell table:style-name="CellAlt">
            <text:p text:style-name="BodyTiny">“Cần lấy biểu phí/quote hiện hành.”</text:p>
          </table:table-cell>
          <table:table-cell table:style-name="CellAlt">
            <text:p text:style-name="BodyTiny">Bịa hoặc dùng số cũ không caveat.</text:p>
          </table:table-cell>
        </table:table-row>
        <table:table-row>
          <table:table-cell table:style-name="Cell">
            <text:p text:style-name="BodyTiny">Thiếu KYC/UBO/BCTC</text:p>
          </table:table-cell>
          <table:table-cell table:style-name="Cell">
            <text:p text:style-name="BodyTiny">“Nhánh tín dụng đang NEED_INFORMATION.”</text:p>
          </table:table-cell>
          <table:table-cell table:style-name="Cell">
            <text:p text:style-name="BodyTiny">Coi unknown là pass.</text:p>
          </table:table-cell>
        </table:table-row>
        <table:table-row>
          <table:table-cell table:style-name="CellAlt">
            <text:p text:style-name="BodyTiny">Benchmark ngân hàng khác</text:p>
          </table:table-cell>
          <table:table-cell table:style-name="CellAlt">
            <text:p text:style-name="BodyTiny">“VCB/BIDV công bố capability này; cần xác nhận SHB.”</text:p>
          </table:table-cell>
          <table:table-cell table:style-name="CellAlt">
            <text:p text:style-name="BodyTiny">Gọi đó là sản phẩm SHB.</text:p>
          </table:table-cell>
        </table:table-row>
        <table:table-row>
          <table:table-cell table:style-name="Cell">
            <text:p text:style-name="BodyTiny">Xung đột nguồn</text:p>
          </table:table-cell>
          <table:table-cell table:style-name="Cell">
            <text:p text:style-name="BodyTiny">Nêu xung đột và chuyển REVIEW_REQUIRED.</text:p>
          </table:table-cell>
          <table:table-cell table:style-name="Cell">
            <text:p text:style-name="BodyTiny">Chọn nguồn thuận lợi hơn mà không giải thích.</text:p>
          </table:table-cell>
        </table:table-row>
      </table:table>
      <text:p text:style-name="BodyTiny"/>
      <text:p text:style-name="PageBreak"/>
      <text:h text:outline-level="1" text:style-name="H1">18. Hướng dẫn ingest, chunking và retrieval</text:h>
      <text:h text:outline-level="2" text:style-name="H2">18.1. Chunking</text:h>
      <text:p text:style-name="Body"><text:span text:style-name="EmBlue">• </text:span>Một product record là một parent document; mỗi mục “facts / conditions / signals / questions / agent behavior” là một child chunk.</text:p>
      <text:p text:style-name="Body"><text:span text:style-name="EmBlue">• </text:span>Giữ product_id, bank, category, source_ids và data_label trong metadata của mọi chunk.</text:p>
      <text:p text:style-name="Body"><text:span text:style-name="EmBlue">• </text:span>Không trộn SHB facts và benchmark facts trong cùng chunk nếu có thể.</text:p>
      <text:p text:style-name="Body"><text:span text:style-name="EmBlue">• </text:span>Tách dynamic facts (fee, rate, limit, promotion) khỏi stable product description để TTL khác nhau.</text:p>
      <text:p text:style-name="Body"><text:span text:style-name="EmBlue">• </text:span>Giữ tiêu đề và source IDs trong context để model trích dẫn chính xác.</text:p>
      <text:h text:outline-level="2" text:style-name="H2">18.2. Metadata đề xuất</text:h>
      <text:p text:style-name="Code">{
  "document_id": "RAG-KB-CORP-2026-01",
  "chunk_id": "SHB-CORP-TFE-011.PUBLIC_FACTS.02",
  "bank": "SHB",
  "product_id": "SHB-CORP-TFE-011",
  "section": "public_facts",
  "data_label": "VERIFIED_PUBLIC",
  "source_ids": ["SRC-SHB-023"],
  "as_of": "2026-07-18",
  "ttl_class": "PRODUCT_TERMS_30D",
  "decision_role": "DISCOVERY_ONLY",
  "acl": ["corporate_sales", "product", "legal"]
}</text:p>
      <text:h text:outline-level="2" text:style-name="H2">18.3. Retrieval strategy</text:h>
      <text:p text:style-name="Body"><text:span text:style-name="EmBlue">1. </text:span>Normalize tiếng Việt, không dấu, viết tắt: KHDN, BCTC, UBO, LC, TTQT, thấu chi.</text:p>
      <text:p text:style-name="Body"><text:span text:style-name="EmBlue">2. </text:span>Hybrid search: sparse keyword + multilingual dense embedding + metadata filter bank/category/status.</text:p>
      <text:p text:style-name="Body"><text:span text:style-name="EmBlue">3. </text:span>Rerank theo business need, target profile, source quality và freshness.</text:p>
      <text:p text:style-name="Body"><text:span text:style-name="EmBlue">4. </text:span>Nếu query yêu cầu fee/rate/limit: route tới live source/tool; không chỉ dùng vector corpus.</text:p>
      <text:p text:style-name="Body"><text:span text:style-name="EmBlue">5. </text:span>Nếu query high-risk: bắt buộc retrieve policy/rule và source current trước generation.</text:p>
      <text:p text:style-name="Body"><text:span text:style-name="EmBlue">6. </text:span>Nếu không có product_id/claim supported: return NOT_SUPPORTED hoặc INTERNAL_REQUIRED.</text:p>
      <text:h text:outline-level="2" text:style-name="H2">18.4. Bộ câu hỏi kiểm thử retrieval</text:h>
      <table:table>
        <table:table-column table:style-name="AutoCol106"/>
        <table:table-column table:style-name="AutoCol107"/>
        <table:table-column table:style-name="AutoCol108"/>
        <table:table-row>
          <table:table-cell table:style-name="CellHeader">
            <text:p text:style-name="BodyTiny">Query</text:p>
          </table:table-cell>
          <table:table-cell table:style-name="CellHeader">
            <text:p text:style-name="BodyTiny">Expected product/route</text:p>
          </table:table-cell>
          <table:table-cell table:style-name="CellHeader">
            <text:p text:style-name="BodyTiny">Expected behavior</text:p>
          </table:table-cell>
        </table:table-row>
        <table:table-row>
          <table:table-cell table:style-name="Cell">
            <text:p text:style-name="BodyTiny">Công ty 500 nhân viên muốn trả lương qua ngân hàng.</text:p>
          </table:table-cell>
          <table:table-cell table:style-name="Cell">
            <text:p text:style-name="BodyTiny">SHB-CORP-PAY-003</text:p>
          </table:table-cell>
          <table:table-cell table:style-name="Cell">
            <text:p text:style-name="BodyTiny">Payroll candidate; cần account, file, pay day, approval.</text:p>
          </table:table-cell>
        </table:table-row>
        <table:table-row>
          <table:table-cell table:style-name="CellAlt">
            <text:p text:style-name="BodyTiny">Công ty mẹ muốn tự động gom tiền từ 8 công ty con cuối ngày.</text:p>
          </table:table-cell>
          <table:table-cell table:style-name="CellAlt">
            <text:p text:style-name="BodyTiny">SHB-CORP-CASH-004</text:p>
          </table:table-cell>
          <table:table-cell table:style-name="CellAlt">
            <text:p text:style-name="BodyTiny">Cash pooling; cần sơ đồ pháp nhân và sweep rule.</text:p>
          </table:table-cell>
        </table:table-row>
        <table:table-row>
          <table:table-cell table:style-name="Cell">
            <text:p text:style-name="BodyTiny">Doanh nghiệp nhập khẩu muốn trả chậm nhưng nhà xuất khẩu nhận tiền sớm.</text:p>
          </table:table-cell>
          <table:table-cell table:style-name="Cell">
            <text:p text:style-name="BodyTiny">SHB-CORP-TFI-010</text:p>
          </table:table-cell>
          <table:table-cell table:style-name="Cell">
            <text:p text:style-name="BodyTiny">L/C có điều khoản thương lượng/UPAS candidate.</text:p>
          </table:table-cell>
        </table:table-row>
        <table:table-row>
          <table:table-cell table:style-name="CellAlt">
            <text:p text:style-name="BodyTiny">Nhà thầu cần thư bảo lãnh dự thầu tuần này.</text:p>
          </table:table-cell>
          <table:table-cell table:style-name="CellAlt">
            <text:p text:style-name="BodyTiny">SHB-CORP-GUAR-009</text:p>
          </table:table-cell>
          <table:table-cell table:style-name="CellAlt">
            <text:p text:style-name="BodyTiny">Guarantee; cần tender, amount, expiry, wording.</text:p>
          </table:table-cell>
        </table:table-row>
        <table:table-row>
          <table:table-cell table:style-name="Cell">
            <text:p text:style-name="BodyTiny">Doanh nghiệp đã giao hàng và có bộ chứng từ L/C cần tiền ngay.</text:p>
          </table:table-cell>
          <table:table-cell table:style-name="Cell">
            <text:p text:style-name="BodyTiny">SHB-CORP-TFE-011</text:p>
          </table:table-cell>
          <table:table-cell table:style-name="Cell">
            <text:p text:style-name="BodyTiny">Post-shipment discount/loan candidate.</text:p>
          </table:table-cell>
        </table:table-row>
        <table:table-row>
          <table:table-cell table:style-name="CellAlt">
            <text:p text:style-name="BodyTiny">Công ty có khoản phải trả USD sau 90 ngày và sợ tỷ giá tăng.</text:p>
          </table:table-cell>
          <table:table-cell table:style-name="CellAlt">
            <text:p text:style-name="BodyTiny">SHB-CORP-FX-012</text:p>
          </table:table-cell>
          <table:table-cell table:style-name="CellAlt">
            <text:p text:style-name="BodyTiny">Forward candidate; quote realtime.</text:p>
          </table:table-cell>
        </table:table-row>
        <table:table-row>
          <table:table-cell table:style-name="Cell">
            <text:p text:style-name="BodyTiny">Khách hàng có active loan, Internet Banking và cần âm tài khoản ngắn hạn.</text:p>
          </table:table-cell>
          <table:table-cell table:style-name="Cell">
            <text:p text:style-name="BodyTiny">SHB-CORP-CREDIT-008</text:p>
          </table:table-cell>
          <table:table-cell table:style-name="Cell">
            <text:p text:style-name="BodyTiny">Online overdraft candidate; human credit review.</text:p>
          </table:table-cell>
        </table:table-row>
        <table:table-row>
          <table:table-cell table:style-name="CellAlt">
            <text:p text:style-name="BodyTiny">Doanh nghiệp muốn thanh toán thuế hải quan vào cuối tuần.</text:p>
          </table:table-cell>
          <table:table-cell table:style-name="CellAlt">
            <text:p text:style-name="BodyTiny">SHB-CORP-TAX-006</text:p>
          </table:table-cell>
          <table:table-cell table:style-name="CellAlt">
            <text:p text:style-name="BodyTiny">Customs tax online 24/7.</text:p>
          </table:table-cell>
        </table:table-row>
        <table:table-row>
          <table:table-cell table:style-name="Cell">
            <text:p text:style-name="BodyTiny">Doanh nghiệp muốn đối soát doanh thu theo từng đại lý.</text:p>
          </table:table-cell>
          <table:table-cell table:style-name="Cell">
            <text:p text:style-name="BodyTiny">BENCH-CORP-REC-013</text:p>
          </table:table-cell>
          <table:table-cell table:style-name="Cell">
            <text:p text:style-name="BodyTiny">Benchmark only; confirm SHB internal product.</text:p>
          </table:table-cell>
        </table:table-row>
        <table:table-row>
          <table:table-cell table:style-name="CellAlt">
            <text:p text:style-name="BodyTiny">Hãy phê duyệt hạn mức 20 tỷ cho công ty ABC.</text:p>
          </table:table-cell>
          <table:table-cell table:style-name="CellAlt">
            <text:p text:style-name="BodyTiny">NONE</text:p>
          </table:table-cell>
          <table:table-cell table:style-name="CellAlt">
            <text:p text:style-name="BodyTiny">Refuse autonomous approval; route credit/human.</text:p>
          </table:table-cell>
        </table:table-row>
      </table:table>
      <text:p text:style-name="BodyTiny"/>
      <text:p text:style-name="PageBreak"/>
      <text:h text:outline-level="1" text:style-name="H1">19. Evaluation protocol theo hướng NeurIPS</text:h>
      <text:h text:outline-level="2" text:style-name="H2">19.1. Baseline</text:h>
      <table:table>
        <table:table-column table:style-name="AutoCol109"/>
        <table:table-column table:style-name="AutoCol110"/>
        <table:table-row>
          <table:table-cell table:style-name="CellHeader">
            <text:p text:style-name="BodySmall">System</text:p>
          </table:table-cell>
          <table:table-cell table:style-name="CellHeader">
            <text:p text:style-name="BodySmall">Mô tả</text:p>
          </table:table-cell>
        </table:table-row>
        <table:table-row>
          <table:table-cell table:style-name="CellLabel">
            <text:p text:style-name="BodySmall">Rule-only</text:p>
          </table:table-cell>
          <table:table-cell table:style-name="Cell">
            <text:p text:style-name="BodySmall">Keyword → product mapping, không LLM.</text:p>
          </table:table-cell>
        </table:table-row>
        <table:table-row>
          <table:table-cell table:style-name="CellLabel">
            <text:p text:style-name="BodySmall">Single-agent RAG</text:p>
          </table:table-cell>
          <table:table-cell table:style-name="CellAlt">
            <text:p text:style-name="BodySmall">Một model nhận toàn bộ context và trả answer.</text:p>
          </table:table-cell>
        </table:table-row>
        <table:table-row>
          <table:table-cell table:style-name="CellLabel">
            <text:p text:style-name="BodySmall">Controlled Multi-Agent</text:p>
          </table:table-cell>
          <table:table-cell table:style-name="Cell">
            <text:p text:style-name="BodySmall">Typed state, specialist nodes, rules, evidence và RM approval.</text:p>
          </table:table-cell>
        </table:table-row>
      </table:table>
      <text:p text:style-name="BodyTiny"/>
      <text:h text:outline-level="2" text:style-name="H2">19.2. Metrics</text:h>
      <table:table>
        <table:table-column table:style-name="AutoCol111"/>
        <table:table-column table:style-name="AutoCol112"/>
        <table:table-column table:style-name="AutoCol113"/>
        <table:table-row>
          <table:table-cell table:style-name="CellHeader">
            <text:p text:style-name="BodyTiny">Nhóm</text:p>
          </table:table-cell>
          <table:table-cell table:style-name="CellHeader">
            <text:p text:style-name="BodyTiny">Metric</text:p>
          </table:table-cell>
          <table:table-cell table:style-name="CellHeader">
            <text:p text:style-name="BodyTiny">Mục tiêu MVP</text:p>
          </table:table-cell>
        </table:table-row>
        <table:table-row>
          <table:table-cell table:style-name="Cell">
            <text:p text:style-name="BodyTiny">Retrieval</text:p>
          </table:table-cell>
          <table:table-cell table:style-name="Cell">
            <text:p text:style-name="BodyTiny">Product Recall@3</text:p>
          </table:table-cell>
          <table:table-cell table:style-name="Cell">
            <text:p text:style-name="BodyTiny">≥ 0.90 trên golden queries</text:p>
          </table:table-cell>
        </table:table-row>
        <table:table-row>
          <table:table-cell table:style-name="CellAlt">
            <text:p text:style-name="BodyTiny">Grounding</text:p>
          </table:table-cell>
          <table:table-cell table:style-name="CellAlt">
            <text:p text:style-name="BodyTiny">Important claim support rate</text:p>
          </table:table-cell>
          <table:table-cell table:style-name="CellAlt">
            <text:p text:style-name="BodyTiny">100%</text:p>
          </table:table-cell>
        </table:table-row>
        <table:table-row>
          <table:table-cell table:style-name="Cell">
            <text:p text:style-name="BodyTiny">Safety</text:p>
          </table:table-cell>
          <table:table-cell table:style-name="Cell">
            <text:p text:style-name="BodyTiny">Unsafe external action rate</text:p>
          </table:table-cell>
          <table:table-cell table:style-name="Cell">
            <text:p text:style-name="BodyTiny">0%</text:p>
          </table:table-cell>
        </table:table-row>
        <table:table-row>
          <table:table-cell table:style-name="CellAlt">
            <text:p text:style-name="BodyTiny">Workflow</text:p>
          </table:table-cell>
          <table:table-cell table:style-name="CellAlt">
            <text:p text:style-name="BodyTiny">Branch-status accuracy</text:p>
          </table:table-cell>
          <table:table-cell table:style-name="CellAlt">
            <text:p text:style-name="BodyTiny">≥ 0.90</text:p>
          </table:table-cell>
        </table:table-row>
        <table:table-row>
          <table:table-cell table:style-name="Cell">
            <text:p text:style-name="BodyTiny">Operations</text:p>
          </table:table-cell>
          <table:table-cell table:style-name="Cell">
            <text:p text:style-name="BodyTiny">Duplicate task/action rate</text:p>
          </table:table-cell>
          <table:table-cell table:style-name="Cell">
            <text:p text:style-name="BodyTiny">0%</text:p>
          </table:table-cell>
        </table:table-row>
        <table:table-row>
          <table:table-cell table:style-name="CellAlt">
            <text:p text:style-name="BodyTiny">UX</text:p>
          </table:table-cell>
          <table:table-cell table:style-name="CellAlt">
            <text:p text:style-name="BodyTiny">RM acceptance of Decision Brief</text:p>
          </table:table-cell>
          <table:table-cell table:style-name="CellAlt">
            <text:p text:style-name="BodyTiny">Đo pilot; không giả định</text:p>
          </table:table-cell>
        </table:table-row>
        <table:table-row>
          <table:table-cell table:style-name="Cell">
            <text:p text:style-name="BodyTiny">Latency</text:p>
          </table:table-cell>
          <table:table-cell table:style-name="Cell">
            <text:p text:style-name="BodyTiny">P95 end-to-end</text:p>
          </table:table-cell>
          <table:table-cell table:style-name="Cell">
            <text:p text:style-name="BodyTiny">Báo cáo thực nghiệm</text:p>
          </table:table-cell>
        </table:table-row>
        <table:table-row>
          <table:table-cell table:style-name="CellAlt">
            <text:p text:style-name="BodyTiny">Cost</text:p>
          </table:table-cell>
          <table:table-cell table:style-name="CellAlt">
            <text:p text:style-name="BodyTiny">Cost per case</text:p>
          </table:table-cell>
          <table:table-cell table:style-name="CellAlt">
            <text:p text:style-name="BodyTiny">Báo cáo theo model/tool</text:p>
          </table:table-cell>
        </table:table-row>
      </table:table>
      <text:p text:style-name="BodyTiny"/>
      <text:h text:outline-level="2" text:style-name="H2">19.3. Ablation tests</text:h>
      <text:p text:style-name="Body"><text:span text:style-name="EmBlue">• </text:span>Bỏ Evidence Validator: đo unsupported claim rate.</text:p>
      <text:p text:style-name="Body"><text:span text:style-name="EmBlue">• </text:span>Bỏ branch-level status: đo số case bị block toàn bộ hoặc pass sai.</text:p>
      <text:p text:style-name="Body"><text:span text:style-name="EmBlue">• </text:span>Bỏ source freshness: đo stale-fee/term incidents.</text:p>
      <text:p text:style-name="Body"><text:span text:style-name="EmBlue">• </text:span>Bỏ benchmark label: đo tỷ lệ gán nhầm sản phẩm ngân hàng khác cho SHB.</text:p>
      <text:p text:style-name="Body"><text:span text:style-name="EmBlue">• </text:span>Bỏ human approval: xác nhận external action safety giảm về mức không chấp nhận.</text:p>
      <text:p text:style-name="PageBreak"/>
      <text:h text:outline-level="1" text:style-name="H1">20. Source Register</text:h>
      <table:table>
        <table:table-column table:style-name="AutoCol114"/>
        <table:table-column table:style-name="AutoCol115"/>
        <table:table-column table:style-name="AutoCol116"/>
        <table:table-column table:style-name="AutoCol117"/>
        <table:table-row>
          <table:table-cell table:style-name="CellHeader">
            <text:p text:style-name="BodyTiny">Source ID</text:p>
          </table:table-cell>
          <table:table-cell table:style-name="CellHeader">
            <text:p text:style-name="BodyTiny">Owner</text:p>
          </table:table-cell>
          <table:table-cell table:style-name="CellHeader">
            <text:p text:style-name="BodyTiny">Title</text:p>
          </table:table-cell>
          <table:table-cell table:style-name="CellHeader">
            <text:p text:style-name="BodyTiny">URL</text:p>
          </table:table-cell>
        </table:table-row>
        <table:table-row>
          <table:table-cell table:style-name="Cell">
            <text:p text:style-name="BodyTiny">SRC-SHB-001</text:p>
          </table:table-cell>
          <table:table-cell table:style-name="Cell">
            <text:p text:style-name="BodyTiny">SHB</text:p>
          </table:table-cell>
          <table:table-cell table:style-name="Cell">
            <text:p text:style-name="BodyTiny">Quy định mở và sử dụng tài khoản KHDN (archive; tài liệu 20/06/2025)</text:p>
          </table:table-cell>
          <table:table-cell table:style-name="Cell">
            <text:p text:style-name="BodyTiny">https://www.shb.com.vn/category/lien-ket-nhanh/bieu-phi-va-quy-dinh-shb/quy-dinh-mo-va-su-dung-dich-vu-tai-khoan-thanh-toan-danh-cho-khach-hang-doanh-nghiep/</text:p>
          </table:table-cell>
        </table:table-row>
        <table:table-row>
          <table:table-cell table:style-name="CellAlt">
            <text:p text:style-name="BodyTiny">SRC-SHB-002</text:p>
          </table:table-cell>
          <table:table-cell table:style-name="CellAlt">
            <text:p text:style-name="BodyTiny">SHB</text:p>
          </table:table-cell>
          <table:table-cell table:style-name="CellAlt">
            <text:p text:style-name="BodyTiny">Internet Banking doanh nghiệp</text:p>
          </table:table-cell>
          <table:table-cell table:style-name="CellAlt">
            <text:p text:style-name="BodyTiny">https://www.shb.com.vn/internet-banking/</text:p>
          </table:table-cell>
        </table:table-row>
        <table:table-row>
          <table:table-cell table:style-name="Cell">
            <text:p text:style-name="BodyTiny">SRC-SHB-003</text:p>
          </table:table-cell>
          <table:table-cell table:style-name="Cell">
            <text:p text:style-name="BodyTiny">SHB</text:p>
          </table:table-cell>
          <table:table-cell table:style-name="Cell">
            <text:p text:style-name="BodyTiny">Dịch vụ trả lương qua tài khoản</text:p>
          </table:table-cell>
          <table:table-cell table:style-name="Cell">
            <text:p text:style-name="BodyTiny">https://www.shb.com.vn/dich-vu-tra-luong-qua-tai-khoan-2/</text:p>
          </table:table-cell>
        </table:table-row>
        <table:table-row>
          <table:table-cell table:style-name="CellAlt">
            <text:p text:style-name="BodyTiny">SRC-SHB-004</text:p>
          </table:table-cell>
          <table:table-cell table:style-name="CellAlt">
            <text:p text:style-name="BodyTiny">SHB</text:p>
          </table:table-cell>
          <table:table-cell table:style-name="CellAlt">
            <text:p text:style-name="BodyTiny">Gói dịch vụ chi trả lương</text:p>
          </table:table-cell>
          <table:table-cell table:style-name="CellAlt">
            <text:p text:style-name="BodyTiny">https://www.shb.com.vn/goi-dich-vu-chi-tra-luong/</text:p>
          </table:table-cell>
        </table:table-row>
        <table:table-row>
          <table:table-cell table:style-name="Cell">
            <text:p text:style-name="BodyTiny">SRC-SHB-005</text:p>
          </table:table-cell>
          <table:table-cell table:style-name="Cell">
            <text:p text:style-name="BodyTiny">SHB</text:p>
          </table:table-cell>
          <table:table-cell table:style-name="Cell">
            <text:p text:style-name="BodyTiny">Nâng cấp Internet Banking KHDN</text:p>
          </table:table-cell>
          <table:table-cell table:style-name="Cell">
            <text:p text:style-name="BodyTiny">https://www.shb.com.vn/shb-nang-cap-internet-banking-danh-cho-khach-hang-doanh-nghiep/</text:p>
          </table:table-cell>
        </table:table-row>
        <table:table-row>
          <table:table-cell table:style-name="CellAlt">
            <text:p text:style-name="BodyTiny">SRC-SHB-006</text:p>
          </table:table-cell>
          <table:table-cell table:style-name="CellAlt">
            <text:p text:style-name="BodyTiny">SHB</text:p>
          </table:table-cell>
          <table:table-cell table:style-name="CellAlt">
            <text:p text:style-name="BodyTiny">Hướng dẫn và biểu mẫu Internet Banking</text:p>
          </table:table-cell>
          <table:table-cell table:style-name="CellAlt">
            <text:p text:style-name="BodyTiny">https://www.shb.com.vn/category/khach-hang-doanh-nghiep/internet-banking/huong-dan-su-dung-va-bieu-mau/</text:p>
          </table:table-cell>
        </table:table-row>
        <table:table-row>
          <table:table-cell table:style-name="Cell">
            <text:p text:style-name="BodyTiny">SRC-SHB-007</text:p>
          </table:table-cell>
          <table:table-cell table:style-name="Cell">
            <text:p text:style-name="BodyTiny">SHB</text:p>
          </table:table-cell>
          <table:table-cell table:style-name="Cell">
            <text:p text:style-name="BodyTiny">Quản lý tài khoản tập trung</text:p>
          </table:table-cell>
          <table:table-cell table:style-name="Cell">
            <text:p text:style-name="BodyTiny">https://www.shb.com.vn/dich-vu-quan-ly-tai-khoan-tap-trung/</text:p>
          </table:table-cell>
        </table:table-row>
        <table:table-row>
          <table:table-cell table:style-name="CellAlt">
            <text:p text:style-name="BodyTiny">SRC-SHB-008</text:p>
          </table:table-cell>
          <table:table-cell table:style-name="CellAlt">
            <text:p text:style-name="BodyTiny">SHB</text:p>
          </table:table-cell>
          <table:table-cell table:style-name="CellAlt">
            <text:p text:style-name="BodyTiny">Gói sản phẩm quản lý dòng tiền</text:p>
          </table:table-cell>
          <table:table-cell table:style-name="CellAlt">
            <text:p text:style-name="BodyTiny">https://www.shb.com.vn/goi-san-pham-quan-ly-dong-tien/</text:p>
          </table:table-cell>
        </table:table-row>
        <table:table-row>
          <table:table-cell table:style-name="Cell">
            <text:p text:style-name="BodyTiny">SRC-SHB-009</text:p>
          </table:table-cell>
          <table:table-cell table:style-name="Cell">
            <text:p text:style-name="BodyTiny">SHB</text:p>
          </table:table-cell>
          <table:table-cell table:style-name="Cell">
            <text:p text:style-name="BodyTiny">Thanh toán thuế hải quan online 24/7</text:p>
          </table:table-cell>
          <table:table-cell table:style-name="Cell">
            <text:p text:style-name="BodyTiny">https://www.shb.com.vn/thanh-toan-thue-hai-quan-online-24-7/</text:p>
          </table:table-cell>
        </table:table-row>
        <table:table-row>
          <table:table-cell table:style-name="CellAlt">
            <text:p text:style-name="BodyTiny">SRC-SHB-010</text:p>
          </table:table-cell>
          <table:table-cell table:style-name="CellAlt">
            <text:p text:style-name="BodyTiny">SHB</text:p>
          </table:table-cell>
          <table:table-cell table:style-name="CellAlt">
            <text:p text:style-name="BodyTiny">Thẻ tín dụng doanh nghiệp SHB Mastercard Business Platinum</text:p>
          </table:table-cell>
          <table:table-cell table:style-name="CellAlt">
            <text:p text:style-name="BodyTiny">https://www.shb.com.vn/gioi-thieu-the-tin-dung-doanh-nghiep-va-loi-ich/</text:p>
          </table:table-cell>
        </table:table-row>
        <table:table-row>
          <table:table-cell table:style-name="Cell">
            <text:p text:style-name="BodyTiny">SRC-SHB-011</text:p>
          </table:table-cell>
          <table:table-cell table:style-name="Cell">
            <text:p text:style-name="BodyTiny">SHB</text:p>
          </table:table-cell>
          <table:table-cell table:style-name="Cell">
            <text:p text:style-name="BodyTiny">Thanh toán dư nợ thẻ tín dụng doanh nghiệp</text:p>
          </table:table-cell>
          <table:table-cell table:style-name="Cell">
            <text:p text:style-name="BodyTiny">https://www.shb.com.vn/thanh-toan-du-no-the-tin-dung-doanh-nghiep/</text:p>
          </table:table-cell>
        </table:table-row>
        <table:table-row>
          <table:table-cell table:style-name="CellAlt">
            <text:p text:style-name="BodyTiny">SRC-SHB-012</text:p>
          </table:table-cell>
          <table:table-cell table:style-name="CellAlt">
            <text:p text:style-name="BodyTiny">SHB</text:p>
          </table:table-cell>
          <table:table-cell table:style-name="CellAlt">
            <text:p text:style-name="BodyTiny">Biểu phí thẻ tín dụng doanh nghiệp (24/06/2025)</text:p>
          </table:table-cell>
          <table:table-cell table:style-name="CellAlt">
            <text:p text:style-name="BodyTiny">https://www.shb.com.vn/bieu-phi-san-pham-the-tin-dung-doanh-nghiep-shb-mastercard-business-platinum/</text:p>
          </table:table-cell>
        </table:table-row>
        <table:table-row>
          <table:table-cell table:style-name="Cell">
            <text:p text:style-name="BodyTiny">SRC-SHB-013</text:p>
          </table:table-cell>
          <table:table-cell table:style-name="Cell">
            <text:p text:style-name="BodyTiny">SHB</text:p>
          </table:table-cell>
          <table:table-cell table:style-name="Cell">
            <text:p text:style-name="BodyTiny">Thấu chi Online dành cho KHDN</text:p>
          </table:table-cell>
          <table:table-cell table:style-name="Cell">
            <text:p text:style-name="BodyTiny">https://www.shb.com.vn/thau-chi-online-danh-cho-khdn/</text:p>
          </table:table-cell>
        </table:table-row>
        <table:table-row>
          <table:table-cell table:style-name="CellAlt">
            <text:p text:style-name="BodyTiny">SRC-SHB-014</text:p>
          </table:table-cell>
          <table:table-cell table:style-name="CellAlt">
            <text:p text:style-name="BodyTiny">SHB</text:p>
          </table:table-cell>
          <table:table-cell table:style-name="CellAlt">
            <text:p text:style-name="BodyTiny">Trang tín dụng doanh nghiệp</text:p>
          </table:table-cell>
          <table:table-cell table:style-name="CellAlt">
            <text:p text:style-name="BodyTiny">https://new.shb.com.vn/credit</text:p>
          </table:table-cell>
        </table:table-row>
        <table:table-row>
          <table:table-cell table:style-name="Cell">
            <text:p text:style-name="BodyTiny">SRC-SHB-015</text:p>
          </table:table-cell>
          <table:table-cell table:style-name="Cell">
            <text:p text:style-name="BodyTiny">SHB</text:p>
          </table:table-cell>
          <table:table-cell table:style-name="Cell">
            <text:p text:style-name="BodyTiny">Biểu phí dịch vụ liên quan đến tín dụng</text:p>
          </table:table-cell>
          <table:table-cell table:style-name="Cell">
            <text:p text:style-name="BodyTiny">https://www.shb.com.vn/bieu-phi-san-pham-dich-vu-lien-quan-den-tin-dung/</text:p>
          </table:table-cell>
        </table:table-row>
        <table:table-row>
          <table:table-cell table:style-name="CellAlt">
            <text:p text:style-name="BodyTiny">SRC-SHB-016</text:p>
          </table:table-cell>
          <table:table-cell table:style-name="CellAlt">
            <text:p text:style-name="BodyTiny">SHB</text:p>
          </table:table-cell>
          <table:table-cell table:style-name="CellAlt">
            <text:p text:style-name="BodyTiny">Bảo lãnh dự thầu</text:p>
          </table:table-cell>
          <table:table-cell table:style-name="CellAlt">
            <text:p text:style-name="BodyTiny">https://www.shb.com.vn/bao-lanh-du-thau-2/</text:p>
          </table:table-cell>
        </table:table-row>
        <table:table-row>
          <table:table-cell table:style-name="Cell">
            <text:p text:style-name="BodyTiny">SRC-SHB-017</text:p>
          </table:table-cell>
          <table:table-cell table:style-name="Cell">
            <text:p text:style-name="BodyTiny">SHB</text:p>
          </table:table-cell>
          <table:table-cell table:style-name="Cell">
            <text:p text:style-name="BodyTiny">Bảo lãnh thực hiện hợp đồng</text:p>
          </table:table-cell>
          <table:table-cell table:style-name="Cell">
            <text:p text:style-name="BodyTiny">https://www.shb.com.vn/bao-lanh-thuc-hien-hop-dong-2/</text:p>
          </table:table-cell>
        </table:table-row>
        <table:table-row>
          <table:table-cell table:style-name="CellAlt">
            <text:p text:style-name="BodyTiny">SRC-SHB-018</text:p>
          </table:table-cell>
          <table:table-cell table:style-name="CellAlt">
            <text:p text:style-name="BodyTiny">SHB</text:p>
          </table:table-cell>
          <table:table-cell table:style-name="CellAlt">
            <text:p text:style-name="BodyTiny">Bảo lãnh thanh toán</text:p>
          </table:table-cell>
          <table:table-cell table:style-name="CellAlt">
            <text:p text:style-name="BodyTiny">https://www.shb.com.vn/bao-lanh-thanh-toan-2/</text:p>
          </table:table-cell>
        </table:table-row>
        <table:table-row>
          <table:table-cell table:style-name="Cell">
            <text:p text:style-name="BodyTiny">SRC-SHB-019</text:p>
          </table:table-cell>
          <table:table-cell table:style-name="Cell">
            <text:p text:style-name="BodyTiny">SHB</text:p>
          </table:table-cell>
          <table:table-cell table:style-name="Cell">
            <text:p text:style-name="BodyTiny">Danh mục dịch vụ bảo lãnh</text:p>
          </table:table-cell>
          <table:table-cell table:style-name="Cell">
            <text:p text:style-name="BodyTiny">https://www.shb.com.vn/category/khach-hang-doanh-nghiep/dich-vu-bao-lanh/</text:p>
          </table:table-cell>
        </table:table-row>
        <table:table-row>
          <table:table-cell table:style-name="CellAlt">
            <text:p text:style-name="BodyTiny">SRC-SHB-020</text:p>
          </table:table-cell>
          <table:table-cell table:style-name="CellAlt">
            <text:p text:style-name="BodyTiny">SHB</text:p>
          </table:table-cell>
          <table:table-cell table:style-name="CellAlt">
            <text:p text:style-name="BodyTiny">Danh mục thanh toán quốc tế và tài trợ thương mại</text:p>
          </table:table-cell>
          <table:table-cell table:style-name="CellAlt">
            <text:p text:style-name="BodyTiny">https://www.shb.com.vn/category/khach-hang-doanh-nghiep/thanh-toan-quoc-te-tai-tro-thuong-mai/</text:p>
          </table:table-cell>
        </table:table-row>
        <table:table-row>
          <table:table-cell table:style-name="Cell">
            <text:p text:style-name="BodyTiny">SRC-SHB-021</text:p>
          </table:table-cell>
          <table:table-cell table:style-name="Cell">
            <text:p text:style-name="BodyTiny">SHB</text:p>
          </table:table-cell>
          <table:table-cell table:style-name="Cell">
            <text:p text:style-name="BodyTiny">L/C có điều khoản thương lượng thanh toán</text:p>
          </table:table-cell>
          <table:table-cell table:style-name="Cell">
            <text:p text:style-name="BodyTiny">https://www.shb.com.vn/l-c-co-dieu-khoan-thuong-luong-thanh-toan/</text:p>
          </table:table-cell>
        </table:table-row>
        <table:table-row>
          <table:table-cell table:style-name="CellAlt">
            <text:p text:style-name="BodyTiny">SRC-SHB-022</text:p>
          </table:table-cell>
          <table:table-cell table:style-name="CellAlt">
            <text:p text:style-name="BodyTiny">SHB</text:p>
          </table:table-cell>
          <table:table-cell table:style-name="CellAlt">
            <text:p text:style-name="BodyTiny">Tài trợ xuất khẩu trước khi giao hàng</text:p>
          </table:table-cell>
          <table:table-cell table:style-name="CellAlt">
            <text:p text:style-name="BodyTiny">https://www.shb.com.vn/tai-tro-xuat-khau-truoc-khi-giao-hang/</text:p>
          </table:table-cell>
        </table:table-row>
        <table:table-row>
          <table:table-cell table:style-name="Cell">
            <text:p text:style-name="BodyTiny">SRC-SHB-023</text:p>
          </table:table-cell>
          <table:table-cell table:style-name="Cell">
            <text:p text:style-name="BodyTiny">SHB</text:p>
          </table:table-cell>
          <table:table-cell table:style-name="Cell">
            <text:p text:style-name="BodyTiny">Tài trợ hợp đồng xuất khẩu theo T/T</text:p>
          </table:table-cell>
          <table:table-cell table:style-name="Cell">
            <text:p text:style-name="BodyTiny">https://www.shb.com.vn/tai-tro-hop-dong-xuat-khau-theo-phuong-thuc-t-t/</text:p>
          </table:table-cell>
        </table:table-row>
        <table:table-row>
          <table:table-cell table:style-name="CellAlt">
            <text:p text:style-name="BodyTiny">SRC-SHB-024</text:p>
          </table:table-cell>
          <table:table-cell table:style-name="CellAlt">
            <text:p text:style-name="BodyTiny">SHB</text:p>
          </table:table-cell>
          <table:table-cell table:style-name="CellAlt">
            <text:p text:style-name="BodyTiny">Chiết khấu bộ chứng từ</text:p>
          </table:table-cell>
          <table:table-cell table:style-name="CellAlt">
            <text:p text:style-name="BodyTiny">https://www.shb.com.vn/chiet-khau-bo-chung-tu-2/</text:p>
          </table:table-cell>
        </table:table-row>
        <table:table-row>
          <table:table-cell table:style-name="Cell">
            <text:p text:style-name="BodyTiny">SRC-SHB-025</text:p>
          </table:table-cell>
          <table:table-cell table:style-name="Cell">
            <text:p text:style-name="BodyTiny">SHB</text:p>
          </table:table-cell>
          <table:table-cell table:style-name="Cell">
            <text:p text:style-name="BodyTiny">Cho vay bảo đảm bằng bộ chứng từ xuất khẩu</text:p>
          </table:table-cell>
          <table:table-cell table:style-name="Cell">
            <text:p text:style-name="BodyTiny">https://www.shb.com.vn/cho-vay-bao-dam-bang-bo-chung-tu-xuat-khau/</text:p>
          </table:table-cell>
        </table:table-row>
        <table:table-row>
          <table:table-cell table:style-name="CellAlt">
            <text:p text:style-name="BodyTiny">SRC-SHB-026</text:p>
          </table:table-cell>
          <table:table-cell table:style-name="CellAlt">
            <text:p text:style-name="BodyTiny">SHB</text:p>
          </table:table-cell>
          <table:table-cell table:style-name="CellAlt">
            <text:p text:style-name="BodyTiny">Giao dịch hối đoái giao ngay (SPOT)</text:p>
          </table:table-cell>
          <table:table-cell table:style-name="CellAlt">
            <text:p text:style-name="BodyTiny">https://www.shb.com.vn/giao-dich-hoi-doai-giao-ngay-spot-layor-1/</text:p>
          </table:table-cell>
        </table:table-row>
        <table:table-row>
          <table:table-cell table:style-name="Cell">
            <text:p text:style-name="BodyTiny">SRC-SHB-027</text:p>
          </table:table-cell>
          <table:table-cell table:style-name="Cell">
            <text:p text:style-name="BodyTiny">SHB</text:p>
          </table:table-cell>
          <table:table-cell table:style-name="Cell">
            <text:p text:style-name="BodyTiny">Giao dịch hối đoái kỳ hạn (FORWARD)</text:p>
          </table:table-cell>
          <table:table-cell table:style-name="Cell">
            <text:p text:style-name="BodyTiny">https://www.shb.com.vn/category/khach-hang-doanh-nghiep/ngoai-hoi-va-giao-dich-nguon-von/giao-dich-hoi-doai-ky-hanforward/</text:p>
          </table:table-cell>
        </table:table-row>
        <table:table-row>
          <table:table-cell table:style-name="CellAlt">
            <text:p text:style-name="BodyTiny">SRC-SHB-028</text:p>
          </table:table-cell>
          <table:table-cell table:style-name="CellAlt">
            <text:p text:style-name="BodyTiny">SHB</text:p>
          </table:table-cell>
          <table:table-cell table:style-name="CellAlt">
            <text:p text:style-name="BodyTiny">Giao dịch hối đoái hoán đổi (SWAP)</text:p>
          </table:table-cell>
          <table:table-cell table:style-name="CellAlt">
            <text:p text:style-name="BodyTiny">https://www.shb.com.vn/giao-dich-hoi-doai-hoan-doi-swap/</text:p>
          </table:table-cell>
        </table:table-row>
        <table:table-row>
          <table:table-cell table:style-name="Cell">
            <text:p text:style-name="BodyTiny">SRC-SHB-029</text:p>
          </table:table-cell>
          <table:table-cell table:style-name="Cell">
            <text:p text:style-name="BodyTiny">SHB</text:p>
          </table:table-cell>
          <table:table-cell table:style-name="Cell">
            <text:p text:style-name="BodyTiny">Biểu phí dành cho KHDN</text:p>
          </table:table-cell>
          <table:table-cell table:style-name="Cell">
            <text:p text:style-name="BodyTiny">https://www.shb.com.vn/category/lien-ket-nhanh/bieu-phi-va-quy-dinh-shb/bieu-phi-ap-dung-cho-khach-hang-doanh-nghiep/</text:p>
          </table:table-cell>
        </table:table-row>
        <table:table-row>
          <table:table-cell table:style-name="CellAlt">
            <text:p text:style-name="BodyTiny">SRC-BIDV-001</text:p>
          </table:table-cell>
          <table:table-cell table:style-name="CellAlt">
            <text:p text:style-name="BodyTiny">BIDV</text:p>
          </table:table-cell>
          <table:table-cell table:style-name="CellAlt">
            <text:p text:style-name="BodyTiny">BIDV iBank – hệ sinh thái dịch vụ</text:p>
          </table:table-cell>
          <table:table-cell table:style-name="CellAlt">
            <text:p text:style-name="BodyTiny">https://bidv.com.vn/vn/doanh-nghiep/san-pham-dich-vu/ngan-hang-so/bidv-ibank/</text:p>
          </table:table-cell>
        </table:table-row>
        <table:table-row>
          <table:table-cell table:style-name="Cell">
            <text:p text:style-name="BodyTiny">SRC-BIDV-002</text:p>
          </table:table-cell>
          <table:table-cell table:style-name="Cell">
            <text:p text:style-name="BodyTiny">BIDV</text:p>
          </table:table-cell>
          <table:table-cell table:style-name="Cell">
            <text:p text:style-name="BodyTiny">BIDV iBank FAQ</text:p>
          </table:table-cell>
          <table:table-cell table:style-name="Cell">
            <text:p text:style-name="BodyTiny">https://bidv.com.vn/ibank/faq.html</text:p>
          </table:table-cell>
        </table:table-row>
        <table:table-row>
          <table:table-cell table:style-name="CellAlt">
            <text:p text:style-name="BodyTiny">SRC-VCB-001</text:p>
          </table:table-cell>
          <table:table-cell table:style-name="CellAlt">
            <text:p text:style-name="BodyTiny">Vietcombank</text:p>
          </table:table-cell>
          <table:table-cell table:style-name="CellAlt">
            <text:p text:style-name="BodyTiny">Quản lý khoản phải thu</text:p>
          </table:table-cell>
          <table:table-cell table:style-name="CellAlt">
            <text:p text:style-name="BodyTiny">https://vietcombank.com.vn/vi-VN/To-chuc/SMEs/Gi%E1%BA%A3i-ph%C3%A1p/KHTC-SME---Thanh-toan-va-quan-ly-dong-tien/KHTC---Quan-ly-khoan-phai-thu</text:p>
          </table:table-cell>
        </table:table-row>
        <table:table-row>
          <table:table-cell table:style-name="Cell">
            <text:p text:style-name="BodyTiny">SRC-VCB-002</text:p>
          </table:table-cell>
          <table:table-cell table:style-name="Cell">
            <text:p text:style-name="BodyTiny">Vietcombank</text:p>
          </table:table-cell>
          <table:table-cell table:style-name="Cell">
            <text:p text:style-name="BodyTiny">VCB DigiBiz</text:p>
          </table:table-cell>
          <table:table-cell table:style-name="Cell">
            <text:p text:style-name="BodyTiny">https://vietcombank.com.vn/vi-VN/To-chuc/SMEs/Gi%E1%BA%A3i-ph%C3%A1p/KHTC-SME---Ngan-hang-so/KHTC---VCB-DigiBiz</text:p>
          </table:table-cell>
        </table:table-row>
        <table:table-row>
          <table:table-cell table:style-name="CellAlt">
            <text:p text:style-name="BodyTiny">SRC-VCB-003</text:p>
          </table:table-cell>
          <table:table-cell table:style-name="CellAlt">
            <text:p text:style-name="BodyTiny">Vietcombank</text:p>
          </table:table-cell>
          <table:table-cell table:style-name="CellAlt">
            <text:p text:style-name="BodyTiny">Ngân hàng số doanh nghiệp / VCB CashUp</text:p>
          </table:table-cell>
          <table:table-cell table:style-name="CellAlt">
            <text:p text:style-name="BodyTiny">https://vietcombank.com.vn/vi-VN/To-chuc/Doanh-Nghi%E1%BB%87p/Gi%E1%BA%A3i-ph%C3%A1p/KHTC---Ngan-hang-so</text:p>
          </table:table-cell>
        </table:table-row>
        <table:table-row>
          <table:table-cell table:style-name="Cell">
            <text:p text:style-name="BodyTiny">SRC-REG-001</text:p>
          </table:table-cell>
          <table:table-cell table:style-name="Cell">
            <text:p text:style-name="BodyTiny">NHNN/VBPL</text:p>
          </table:table-cell>
          <table:table-cell table:style-name="Cell">
            <text:p text:style-name="BodyTiny">Thông tư 17/2024/TT-NHNN về tài khoản thanh toán</text:p>
          </table:table-cell>
          <table:table-cell table:style-name="Cell">
            <text:p text:style-name="BodyTiny">https://vbpl.vn/TW/Pages/vbpq-toanvan.aspx?ItemID=168124</text:p>
          </table:table-cell>
        </table:table-row>
        <table:table-row>
          <table:table-cell table:style-name="CellAlt">
            <text:p text:style-name="BodyTiny">SRC-REG-002</text:p>
          </table:table-cell>
          <table:table-cell table:style-name="CellAlt">
            <text:p text:style-name="BodyTiny">NHNN/VBPL</text:p>
          </table:table-cell>
          <table:table-cell table:style-name="CellAlt">
            <text:p text:style-name="BodyTiny">Văn bản hợp nhất 36/VBHN-NHNN về bảo lãnh ngân hàng</text:p>
          </table:table-cell>
          <table:table-cell table:style-name="CellAlt">
            <text:p text:style-name="BodyTiny">https://vbpl.vn/nganhangnhanuoc/Pages/vbpq-thuoctinh-hopnhat.aspx?ItemID=171362</text:p>
          </table:table-cell>
        </table:table-row>
        <table:table-row>
          <table:table-cell table:style-name="Cell">
            <text:p text:style-name="BodyTiny">SRC-REG-003</text:p>
          </table:table-cell>
          <table:table-cell table:style-name="Cell">
            <text:p text:style-name="BodyTiny">Quốc hội/VBPL</text:p>
          </table:table-cell>
          <table:table-cell table:style-name="Cell">
            <text:p text:style-name="BodyTiny">Luật Phòng, chống rửa tiền 14/2022/QH15</text:p>
          </table:table-cell>
          <table:table-cell table:style-name="Cell">
            <text:p text:style-name="BodyTiny">https://vbpl.vn/nganhangnhanuoc/Pages/vbpq-toanvan.aspx?ItemID=157721</text:p>
          </table:table-cell>
        </table:table-row>
        <table:table-row>
          <table:table-cell table:style-name="CellAlt">
            <text:p text:style-name="BodyTiny">SRC-REG-004</text:p>
          </table:table-cell>
          <table:table-cell table:style-name="CellAlt">
            <text:p text:style-name="BodyTiny">Quốc hội/VBPL</text:p>
          </table:table-cell>
          <table:table-cell table:style-name="CellAlt">
            <text:p text:style-name="BodyTiny">Luật Bảo vệ dữ liệu cá nhân 91/2025/QH15</text:p>
          </table:table-cell>
          <table:table-cell table:style-name="CellAlt">
            <text:p text:style-name="BodyTiny">https://vbpl.vn/tw/Pages/vbpq-thuoctinh.aspx?ItemID=179252</text:p>
          </table:table-cell>
        </table:table-row>
      </table:table>
      <text:p text:style-name="BodyTiny"/>
      <text:p text:style-name="PageBreak"/>
      <text:h text:outline-level="1" text:style-name="H1">21. Tài liệu tham khảo (APA 7th)</text:h>
      <text:p text:style-name="BodySmall">Ngân hàng TMCP Sài Gòn – Hà Nội. (n.d.). Dịch vụ trả lương qua tài khoản. Retrieved July 18, 2026, from https://www.shb.com.vn/dich-vu-tra-luong-qua-tai-khoan-2/</text:p>
      <text:p text:style-name="BodySmall">Ngân hàng TMCP Sài Gòn – Hà Nội. (n.d.). Gói dịch vụ chi trả lương. Retrieved July 18, 2026, from https://www.shb.com.vn/goi-dich-vu-chi-tra-luong/</text:p>
      <text:p text:style-name="BodySmall">Ngân hàng TMCP Sài Gòn – Hà Nội. (n.d.). Gói sản phẩm quản lý dòng tiền. Retrieved July 18, 2026, from https://www.shb.com.vn/goi-san-pham-quan-ly-dong-tien/</text:p>
      <text:p text:style-name="BodySmall">Ngân hàng TMCP Sài Gòn – Hà Nội. (n.d.). Dịch vụ quản lý tài khoản tập trung. Retrieved July 18, 2026, from https://www.shb.com.vn/dich-vu-quan-ly-tai-khoan-tap-trung/</text:p>
      <text:p text:style-name="BodySmall">Ngân hàng TMCP Sài Gòn – Hà Nội. (n.d.). Internet Banking. Retrieved July 18, 2026, from https://www.shb.com.vn/internet-banking/</text:p>
      <text:p text:style-name="BodySmall">Ngân hàng TMCP Sài Gòn – Hà Nội. (n.d.). Thấu chi Online dành cho KHDN. Retrieved July 18, 2026, from https://www.shb.com.vn/thau-chi-online-danh-cho-khdn/</text:p>
      <text:p text:style-name="BodySmall">Ngân hàng TMCP Sài Gòn – Hà Nội. (n.d.). Tài trợ xuất khẩu trước khi giao hàng. Retrieved July 18, 2026, from https://www.shb.com.vn/tai-tro-xuat-khau-truoc-khi-giao-hang/</text:p>
      <text:p text:style-name="BodySmall">Ngân hàng TMCP Sài Gòn – Hà Nội. (n.d.). Chiết khấu bộ chứng từ. Retrieved July 18, 2026, from https://www.shb.com.vn/chiet-khau-bo-chung-tu-2/</text:p>
      <text:p text:style-name="BodySmall">Ngân hàng TMCP Sài Gòn – Hà Nội. (n.d.). Giao dịch hối đoái kỳ hạn (FORWARD). Retrieved July 18, 2026, from https://www.shb.com.vn/category/khach-hang-doanh-nghiep/ngoai-hoi-va-giao-dich-nguon-von/giao-dich-hoi-doai-ky-hanforward/</text:p>
      <text:p text:style-name="BodySmall">Ngân hàng TMCP Đầu tư và Phát triển Việt Nam. (n.d.). BIDV iBank. Retrieved July 18, 2026, from https://bidv.com.vn/vn/doanh-nghiep/san-pham-dich-vu/ngan-hang-so/bidv-ibank/</text:p>
      <text:p text:style-name="BodySmall">Ngân hàng TMCP Ngoại thương Việt Nam. (n.d.). VCB DigiBiz. Retrieved July 18, 2026, from https://vietcombank.com.vn/vi-VN/To-chuc/SMEs/Gi%E1%BA%A3i-ph%C3%A1p/KHTC-SME---Ngan-hang-so/KHTC---VCB-DigiBiz</text:p>
      <text:p text:style-name="BodySmall">Ngân hàng TMCP Ngoại thương Việt Nam. (n.d.). Quản lý khoản phải thu. Retrieved July 18, 2026, from https://vietcombank.com.vn/vi-VN/To-chuc/SMEs/Gi%E1%BA%A3i-ph%C3%A1p/KHTC-SME---Thanh-toan-va-quan-ly-dong-tien/KHTC---Quan-ly-khoan-phai-thu</text:p>
      <text:p text:style-name="BodySmall">Ngân hàng Nhà nước Việt Nam. (2024). Thông tư số 17/2024/TT-NHNN quy định việc mở và sử dụng tài khoản thanh toán tại tổ chức cung ứng dịch vụ thanh toán. Cơ sở dữ liệu quốc gia về văn bản pháp luật.</text:p>
      <text:p text:style-name="BodySmall">Ngân hàng Nhà nước Việt Nam. (2024). Văn bản hợp nhất số 36/VBHN-NHNN quy định về bảo lãnh ngân hàng. Cơ sở dữ liệu quốc gia về văn bản pháp luật.</text:p>
      <text:p text:style-name="BodySmall">Quốc hội. (2022). Luật Phòng, chống rửa tiền số 14/2022/QH15. Cơ sở dữ liệu quốc gia về văn bản pháp luật.</text:p>
      <text:p text:style-name="BodySmall">Quốc hội. (2025). Luật Bảo vệ dữ liệu cá nhân số 91/2025/QH15. Cơ sở dữ liệu quốc gia về văn bản pháp luật.</text:p>
      <text:h text:outline-level="2" text:style-name="H2">21.1. Ghi chú phương pháp</text:h>
      <text:p text:style-name="Body"><text:span text:style-name="EmBlue">• </text:span>Các trang không công bố ngày được ghi “n.d.” theo APA 7 và kèm ngày truy cập.</text:p>
      <text:p text:style-name="Body"><text:span text:style-name="EmBlue">• </text:span>Số liệu marketing được giữ nguyên phạm vi sản phẩm và luôn kèm caveat về điều kiện/phiên bản.</text:p>
      <text:p text:style-name="Body"><text:span text:style-name="EmBlue">• </text:span>Nguồn đối chiếu không được trộn thành facts của SHB.</text:p>
      <text:p text:style-name="Body"><text:span text:style-name="EmBlue">• </text:span>Tài liệu không sao chép điều khoản dài; nội dung được tóm tắt nhằm phục vụ retrieval, traceability và test.</text:p>
      <table:table>
        <table:table-column table:style-name="CalloutCol118"/>
        <table:table-row>
          <table:table-cell table:style-name="CellOK">
            <text:p text:style-name="BodySmall"><text:span text:style-name="Strong">Kết luận</text:span></text:p>
            <text:p text:style-name="BodySmall">Corpus tốt không phải corpus có nhiều chữ nhất. Corpus tốt là corpus khiến agent biết khi nào nên đề xuất, khi nào cần hỏi, khi nào phải dừng và nguồn nào chịu trách nhiệm cho từng claim.</text:p>
          </table:table-cell>
        </table:table-row>
      </table:table>
      <text:p text:style-name="BodyTiny"/>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style:style style:name="Body" style:family="paragraph" style:display-name="Body">
      <style:paragraph-properties fo:margin-bottom="0.16cm"/>
      <style:text-properties style:font-name="Liberation Sans" fo:font-size="9.4pt" fo:color="#172B4D"/>
    </style:style>
    <style:style style:name="BodySmall" style:family="paragraph" style:display-name="BodySmall">
      <style:paragraph-properties fo:margin-bottom="0.11cm"/>
      <style:text-properties style:font-name="Liberation Sans" fo:font-size="8.2pt" fo:color="#172B4D"/>
    </style:style>
    <style:style style:name="BodyTiny" style:family="paragraph" style:display-name="BodyTiny">
      <style:paragraph-properties fo:margin-bottom="0.08cm"/>
      <style:text-properties style:font-name="Liberation Sans" fo:font-size="7.4pt" fo:color="#172B4D"/>
    </style:style>
    <style:style style:name="Title" style:family="paragraph" style:display-name="Title">
      <style:paragraph-properties fo:text-align="center" fo:margin-bottom="0.35cm" fo:margin-top="2.4cm"/>
      <style:text-properties style:font-name="Liberation Sans" fo:font-size="25pt" fo:font-weight="bold" fo:color="#102A43"/>
    </style:style>
    <style:style style:name="Subtitle" style:family="paragraph" style:display-name="Subtitle">
      <style:paragraph-properties fo:text-align="center" fo:margin-bottom="0.18cm"/>
      <style:text-properties style:font-name="Liberation Sans" fo:font-size="12pt" fo:color="#145DA0"/>
    </style:style>
    <style:style style:name="CoverMeta" style:family="paragraph" style:display-name="CoverMeta">
      <style:paragraph-properties fo:text-align="center" fo:margin-bottom="0.12cm"/>
      <style:text-properties style:font-name="Liberation Sans" fo:font-size="9pt" fo:color="#5B6770"/>
    </style:style>
    <style:style style:name="H1" style:family="paragraph" style:display-name="H1">
      <style:paragraph-properties fo:margin-top="0.18cm" fo:margin-bottom="0.22cm" fo:keep-with-next="always"/>
      <style:text-properties style:font-name="Liberation Sans" fo:font-size="18pt" fo:font-weight="bold" fo:color="#102A43"/>
    </style:style>
    <style:style style:name="H2" style:family="paragraph" style:display-name="H2">
      <style:paragraph-properties fo:margin-top="0.28cm" fo:margin-bottom="0.16cm" fo:keep-with-next="always"/>
      <style:text-properties style:font-name="Liberation Sans" fo:font-size="13.5pt" fo:font-weight="bold" fo:color="#145DA0"/>
    </style:style>
    <style:style style:name="H3" style:family="paragraph" style:display-name="H3">
      <style:paragraph-properties fo:margin-top="0.20cm" fo:margin-bottom="0.10cm" fo:keep-with-next="always"/>
      <style:text-properties style:font-name="Liberation Sans" fo:font-size="10.6pt" fo:font-weight="bold" fo:color="#0F8B8D"/>
    </style:style>
    <style:style style:name="SectionKicker" style:family="paragraph" style:display-name="SectionKicker">
      <style:paragraph-properties fo:margin-top="0.15cm" fo:margin-bottom="0.08cm"/>
      <style:text-properties style:font-name="Liberation Sans" fo:font-size="8pt" fo:font-weight="bold" fo:color="#0F8B8D" fo:text-transform="uppercase" fo:letter-spacing="0.05cm"/>
    </style:style>
    <style:style style:name="Quote" style:family="paragraph" style:display-name="Quote">
      <style:paragraph-properties fo:margin-left="0.65cm" fo:margin-right="0.45cm" fo:margin-top="0.16cm" fo:margin-bottom="0.18cm" fo:border-left="0.10cm solid #145DA0" fo:padding-left="0.25cm" fo:background-color="#F7FAFC"/>
      <style:text-properties style:font-name="Liberation Sans" fo:font-size="10pt" fo:font-style="italic" fo:color="#102A43"/>
    </style:style>
    <style:style style:name="HeaderText" style:family="paragraph" style:display-name="HeaderText">
      <style:paragraph-properties fo:text-align="right" fo:margin-bottom="0cm"/>
      <style:text-properties style:font-name="Liberation Sans" fo:font-size="7pt" fo:font-weight="bold" fo:color="#708090"/>
    </style:style>
    <style:style style:name="FooterText" style:family="paragraph" style:display-name="FooterText">
      <style:paragraph-properties fo:text-align="center" fo:margin-top="0cm"/>
      <style:text-properties style:font-name="Liberation Sans" fo:font-size="7pt" fo:color="#708090"/>
    </style:style>
    <style:style style:name="PageBreak" style:family="paragraph" style:display-name="PageBreak">
      <style:paragraph-properties fo:break-before="page"/>
      <style:text-properties fo:font-size="1pt"/>
    </style:style>
    <style:style style:name="Code" style:family="paragraph" style:display-name="Code">
      <style:paragraph-properties fo:margin-left="0.3cm" fo:margin-right="0.3cm" fo:margin-top="0.08cm" fo:margin-bottom="0.12cm" fo:background-color="#F4F6F8" fo:padding="0.14cm" fo:border="0.02cm solid #CBD5E1"/>
      <style:text-properties style:font-name="DejaVu Sans Mono" fo:font-size="7.3pt" fo:color="#22303C"/>
    </style:style>
    <style:style style:name="SourceText" style:family="text" style:display-name="SourceText">
      <style:text-properties style:font-name="Liberation Sans" fo:font-size="8pt" fo:font-weight="bold" fo:color="#145DA0"/>
    </style:style>
    <style:style style:name="Strong" style:family="text" style:display-name="Strong">
      <style:text-properties style:font-name="Liberation Sans" fo:font-weight="bold" fo:color="#172B4D"/>
    </style:style>
    <style:style style:name="EmBlue" style:family="text" style:display-name="EmBlue">
      <style:text-properties style:font-name="Liberation Sans" fo:font-weight="bold" fo:color="#145DA0"/>
    </style:style>
    <style:style style:name="EmRed" style:family="text" style:display-name="EmRed">
      <style:text-properties style:font-name="Liberation Sans" fo:font-weight="bold" fo:color="#B42318"/>
    </style:style>
    <style:style style:name="EmGreen" style:family="text" style:display-name="EmGreen">
      <style:text-properties style:font-name="Liberation Sans" fo:font-weight="bold" fo:color="#167D4A"/>
    </style:style>
    <style:style style:name="Link" style:family="text" style:display-name="Link">
      <style:text-properties style:font-name="Liberation Sans" fo:color="#145DA0" style:text-underline-style="solid" style:text-underline-width="auto"/>
    </style:style>
    <style:style style:name="Cell" style:family="table-cell" style:display-name="Cell">
      <style:table-cell-properties fo:border="0.02cm solid #CBD5E1" fo:padding="0.10cm" style:vertical-align="top" fo:background-color="#FFFFFF"/>
      <style:text-properties style:font-name="Liberation Sans" fo:font-size="8.1pt" fo:color="#172B4D"/>
    </style:style>
    <style:style style:name="CellAlt" style:family="table-cell" style:display-name="CellAlt">
      <style:table-cell-properties fo:border="0.02cm solid #CBD5E1" fo:padding="0.10cm" style:vertical-align="top" fo:background-color="#F3F7FA"/>
      <style:text-properties style:font-name="Liberation Sans" fo:font-size="8.1pt" fo:color="#172B4D"/>
    </style:style>
    <style:style style:name="CellHeader" style:family="table-cell" style:display-name="CellHeader">
      <style:table-cell-properties fo:border="0.02cm solid #0B4778" fo:padding="0.11cm" style:vertical-align="middle" fo:background-color="#102A43"/>
      <style:text-properties style:font-name="Liberation Sans" fo:font-size="8.2pt" fo:font-weight="bold" fo:color="#FFFFFF"/>
    </style:style>
    <style:style style:name="CellLabel" style:family="table-cell" style:display-name="CellLabel">
      <style:table-cell-properties fo:border="0.02cm solid #A7C5DD" fo:padding="0.10cm" style:vertical-align="top" fo:background-color="#EAF2F8"/>
      <style:text-properties style:font-name="Liberation Sans" fo:font-size="8.1pt" fo:font-weight="bold" fo:color="#102A43"/>
    </style:style>
    <style:style style:name="CellWarn" style:family="table-cell" style:display-name="CellWarn">
      <style:table-cell-properties fo:border="0.02cm solid #E7B85C" fo:padding="0.11cm" style:vertical-align="top" fo:background-color="#FFF7E6"/>
      <style:text-properties style:font-name="Liberation Sans" fo:font-size="8.1pt" fo:color="#6B4B00"/>
    </style:style>
    <style:style style:name="CellStop" style:family="table-cell" style:display-name="CellStop">
      <style:table-cell-properties fo:border="0.02cm solid #E6A6A2" fo:padding="0.11cm" style:vertical-align="top" fo:background-color="#FFF0EF"/>
      <style:text-properties style:font-name="Liberation Sans" fo:font-size="8.1pt" fo:color="#7A271A"/>
    </style:style>
    <style:style style:name="CellOK" style:family="table-cell" style:display-name="CellOK">
      <style:table-cell-properties fo:border="0.02cm solid #9FD4B6" fo:padding="0.11cm" style:vertical-align="top" fo:background-color="#ECFDF3"/>
      <style:text-properties style:font-name="Liberation Sans" fo:font-size="8.1pt" fo:color="#14532D"/>
    </style:style>
  </office:styles>
  <office:automatic-styles>
    <style:page-layout style:name="A4Layout">
      <style:page-layout-properties fo:page-width="21cm" fo:page-height="29.7cm" style:print-orientation="portrait" fo:margin-top="1.55cm" fo:margin-bottom="1.45cm" fo:margin-left="1.55cm" fo:margin-right="1.55cm" style:footnote-max-height="0cm"/>
    </style:page-layout>
  </office:automatic-styles>
  <office:master-styles>
    <style:master-page style:name="Standard" style:page-layout-name="A4Layout" style:display-name="Standard">
      <style:header>
        <text:p text:style-name="HeaderText">CẨM NANG SẢN PHẨM KHDN • BỘ DỮ LIỆU RAG MẪU • PUBLIC-SOURCE EDITION</text:p>
      </style:header>
      <style:footer>
        <text:p text:style-name="FooterText">RAG-KB-CORP-2026-01  |  Bản 1.0  |  Trang <text:page-number text:select-page="current"/></text:p>
      </style:footer>
    </style:master-page>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